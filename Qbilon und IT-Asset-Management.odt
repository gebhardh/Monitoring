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62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Frage: </text:span>Das Monitoring-Tool Qbilon unterstützt laut Herstellerangaben IT-Asset-Management. Wie wird das realisiert?</text:h>
      <text:p text:style-name="P6"/>
      <text:p text:style-name="P5">Hier eine Übersicht, wie Qbilon das IT-Asset-Management technisch und funktional umsetzt:</text:p>
      <text:p text:style-name="Horizontal_20_Line"/>
      <text:h text:style-name="P2" text:outline-level="3">Qbilon – IT-Asset-Management im Überblick</text:h>
      <text:p text:style-name="P5">Qbilon ist eine IT-Asset-Intelligence-Plattform, gegründet 2019 in Augsburg, die komplexe IT-Landschaften in klare, handlungsrelevante Erkenntnisse umwandelt. Die Plattform schafft eine „Single Source of Truth" für alle IT-Assets, automatisiert Dokumentationsprozesse und bietet tiefe Einblicke in Infrastrukturabhängigkeiten. <text:a xlink:type="simple" xlink:href="https://www.paessler.com/partners/technological-alliances/qbilon" office:target-frame-name="_blank" xlink:show="new" text:style-name="Internet_20_link" text:visited-style-name="Visited_20_Internet_20_Link">Paessler</text:a></text:p>
      <text:h text:style-name="P3" text:outline-level="4">Technische Architektur</text:h>
      <text:p text:style-name="P5">Die Qbilon Suite basiert auf vier Kernkomponenten: einer Konsolidierungsdatenbank, einer Analytics Engine, einer Workflow Engine und einer Monitoring-Komponente auf Basis von Paessler PRTG. <text:a xlink:type="simple" xlink:href="https://www.qbilon.io/" office:target-frame-name="_blank" xlink:show="new" text:style-name="Internet_20_link" text:visited-style-name="Visited_20_Internet_20_Link">Qbilon</text:a></text:p>
      <text:h text:style-name="P3" text:outline-level="4">Wie ITAM konkret realisiert wird</text:h>
      <text:p text:style-name="P5"><text:span text:style-name="Strong_20_Emphasis">1. Multi-Source-Datenintegration</text:span> Qbilon integriert Daten aus mehreren Quellen wie AWS, Azure, GCP, Darktrace, VMware und PRTG und sorgt so für eine einheitliche Sicht auf alle IT-Assets und eine genaue Abhängigkeitskartierung. Diese konsolidierten Daten können dann auch in andere Systeme wie ServiceNow CMDB übertragen werden. <text:a xlink:type="simple" xlink:href="https://sourceforge.net/software/product/Qbilon/" office:target-frame-name="_blank" xlink:show="new" text:style-name="Internet_20_link" text:visited-style-name="Visited_20_Internet_20_Link">SourceForge</text:a></text:p>
      <text:p text:style-name="P5"><text:span text:style-name="Strong_20_Emphasis">2. Automatisierte Inventarisierung</text:span> Qbilon erfasst Asset-Daten aus verschiedenen Quellen und erstellt automatisch ein umfassendes, konsolidiertes und konsistentes Bild der IT-Landschaft. Es bietet Mechanismen, um Asset-Daten flexibel zu erfassen, zusammenzuführen und zu verteilen. <text:a xlink:type="simple" xlink:href="https://www.qbilon.io/faqs/" office:target-frame-name="_blank" xlink:show="new" text:style-name="Internet_20_link" text:visited-style-name="Visited_20_Internet_20_Link">Qbilon</text:a></text:p>
      <text:p text:style-name="P5"><text:span text:style-name="Strong_20_Emphasis">3. Abhängigkeits-Mapping und Visualisierung</text:span> Das flexible Datenmodell erlaubt die Integration beliebiger Daten ohne Anpassung an vordefinierte Strukturen. Abhängigkeitsbäume können erstellt werden, um sofort die Auswirkungen von beispielsweise Hardware-Ausfällen auf Geschäftsprozesse zu verstehen. <text:a xlink:type="simple" xlink:href="https://www.qbilon.io/qbilon-suite/" office:target-frame-name="_blank" xlink:show="new" text:style-name="Internet_20_link" text:visited-style-name="Visited_20_Internet_20_Link">Qbilon</text:a></text:p>
      <text:p text:style-name="P5"><text:span text:style-name="Strong_20_Emphasis">4. CMDB-Synchronisation</text:span> CMDB-Updates werden mit Qbilons direkter ServiceNow-Integration, benutzerdefinierten Bedingungen und Aktualisierungszyklen automatisiert und optimiert. <text:a xlink:type="simple" xlink:href="https://www.qbilon.io/qbilon-platform/" office:target-frame-name="_blank" xlink:show="new" text:style-name="Internet_20_link" text:visited-style-name="Visited_20_Internet_20_Link">Qbilon</text:a></text:p>
      <text:p text:style-name="P5"><text:span text:style-name="Strong_20_Emphasis">5. Netzwerk-Monitoring (Qbilon Suite)</text:span> Die Suite kombiniert die Fähigkeiten von Qbilon mit PRTG in einem Produkt: IT-Dokumentation wird automatisiert, mit dem CMDB synchronisiert und Netzwerk-Assets werden für einen reibungslosen IT-Betrieb überwacht – inklusive anpassbarer Alarmierung und automatischer Netzwerkerkennung. <text:a xlink:type="simple" xlink:href="https://www.qbilon.io/product/" office:target-frame-name="_blank" xlink:show="new" text:style-name="Internet_20_link" text:visited-style-name="Visited_20_Internet_20_Link">Qbilon</text:a></text:p>
      <text:p text:style-name="P5"><text:span text:style-name="Strong_20_Emphasis">6. Agentenloser Betrieb</text:span> Maximale Datensicherheit wird durch eine agentenlose Lösung gewährleistet, die entweder auf sicheren SaaS-Instanzen oder on-premises im firmeneigenen Netzwerk betrieben werden kann. <text:a xlink:type="simple" xlink:href="https://www.qbilon.io/" office:target-frame-name="_blank" xlink:show="new" text:style-name="Internet_20_link" text:visited-style-name="Visited_20_Internet_20_Link">Qbilon</text:a></text:p>
      <text:h text:style-name="P3" text:outline-level="4"><text:soft-page-break/>Typische Anwendungsfälle</text:h>
      <text:p text:style-name="P5">Zu den möglichen Anwendungsfällen zählen die automatische Konsolidierung und Synchronisierung von CMDBs, die Erstellung umfassender Asset-Listen für Berichte, die Unterstützung kontinuierlicher Audits für Notfallplanung und Zertifizierungen sowie die Erlangung vollständiger Transparenz über Kosten und Risiken von „Lost Services". <text:a xlink:type="simple" xlink:href="https://www.qbilon.io/faqs/" office:target-frame-name="_blank" xlink:show="new" text:style-name="Internet_20_link" text:visited-style-name="Visited_20_Internet_20_Link">Qbilon</text:a></text:p>
      <text:p text:style-name="Horizontal_20_Line"/>
      <text:p text:style-name="P5"><text:span text:style-name="Strong_20_Emphasis">Zusammengefasst</text:span> realisiert Qbilon IT-Asset-Management nicht durch klassische Agenten-basierte Inventarisierung, sondern durch die automatisierte Aggregation, Konsolidierung und Analyse von Daten aus bereits vorhandenen IT-Quellsystemen – kombiniert mit Echtzeit-Netzwerkmonitoring via PRTG.</text:p>
      <text:h text:style-name="Heading_20_3" text:outline-level="3"><text:span text:style-name="T1">Frage: </text:span>Können auch Daten aus dem NetworkNodeManager verwertet werden?</text:h>
      <text:p text:style-name="P6"/>
      <text:p text:style-name="P5">Eine direkte, native Integration des <text:span text:style-name="Strong_20_Emphasis">HP Network Node Manager (NNMi)</text:span> ist in der offiziellen Connector-Liste von Qbilon nicht aufgeführt. Laut der vollständigen Connector-Übersicht auf der Qbilon-Website sind aktuell folgende Quellsysteme direkt integrierbar: AWS, Microsoft Azure, Microsoft Entra ID, vSphere, PRTG, ServiceNow, Darktrace, Kubernetes, LUY, Active Directory, ADOIT sowie CSV-Dateien und ein generischer JSON-Importer (Webhook Composer). <text:a xlink:type="simple" xlink:href="https://www.qbilon.io/list-of-connectors/" office:target-frame-name="_blank" xlink:show="new" text:style-name="Internet_20_link" text:visited-style-name="Visited_20_Internet_20_Link">Qbilon</text:a></text:p>
      <text:p text:style-name="P5">Der NNMi taucht dort nicht auf. Es gibt jedoch zwei mögliche Wege, ihn trotzdem anzubinden:</text:p>
      <text:p text:style-name="P5"><text:span text:style-name="Strong_20_Emphasis">1. Generischer API-/Webhook-Connector</text:span> Grundsätzlich kann jede Drittsoftware verbunden werden, sofern sie über eine dokumentierte Web-API verfügt (z. B. REST oder SOAP) und ihre Daten in einem standardisierten, strukturierten Format bereitstellt. Der NNMi bietet eine REST-API – eine Anbindung wäre also technisch denkbar, würde aber individuelle Konfigurationsarbeit erfordern. <text:a xlink:type="simple" xlink:href="https://www.qbilon.io/faqs/" office:target-frame-name="_blank" xlink:show="new" text:style-name="Internet_20_link" text:visited-style-name="Visited_20_Internet_20_Link">Qbilon</text:a></text:p>
      <text:p text:style-name="P5"><text:span text:style-name="Strong_20_Emphasis">2. Custom Tasks via Docker</text:span> Das „Custom Task"-Feature erlaubt es, beliebige Daten über selbst erstellte Docker-Tasks zu importieren, zu verarbeiten und zu exportieren. Darüber ließe sich theoretisch auch NNMi-Daten einbinden. <text:a xlink:type="simple" xlink:href="https://www.qbilon.io/faqs/" office:target-frame-name="_blank" xlink:show="new" text:style-name="Internet_20_link" text:visited-style-name="Visited_20_Internet_20_Link">Qbilon</text:a></text:p>
      <text:p text:style-name="P5"><text:span text:style-name="Strong_20_Emphasis">3. Umweg über CSV-Export</text:span> Viele Netzwerkmanagement-Tools – einschließlich NNMi – erlauben CSV-Exporte ihrer Asset- und Topologiedaten. CSV-Dateien sind als Datenquelle direkt unterstützt. <text:a xlink:type="simple" xlink:href="https://www.qbilon.io/list-of-connectors/" office:target-frame-name="_blank" xlink:show="new" text:style-name="Internet_20_link" text:visited-style-name="Visited_20_Internet_20_Link">Qbilon</text:a></text:p>
      <text:p text:style-name="P5"><text:span text:style-name="Strong_20_Emphasis">Fazit:</text:span> Eine native „Out-of-the-Box"-Integration des Network Node Managers existiert bei Qbilon nicht. Für eine verbindliche Auskunft empfiehlt sich die direkte Kontaktaufnahme mit Qbilon (<text:a xlink:type="simple" xlink:href="mailto:info@qbilon.io" text:style-name="Internet_20_link" text:visited-style-name="Visited_20_Internet_20_Link">info@qbilon.io</text:a>), da das Unternehmen laut FAQ auch „on demand"-Konnektoren entwickelt – wie etwa für Active Directory oder ADOIT.</text:p>
      <text:h text:style-name="Heading_20_3" text:outline-level="3"><text:span text:style-name="T1">Frage: </text:span>Wie bindet man Cisco ACI an?</text:h>
      <text:p text:style-name="P6"/>
      <text:p text:style-name="P5">Cisco ACI ist in der offiziellen Connector-Liste von Qbilon <text:span text:style-name="Strong_20_Emphasis">nicht als nativer Konnektor</text:span> aufgeführt – weder als fertiger noch als „on demand"-Connector. Die Suche ergibt <text:soft-page-break/>keine Hinweise auf eine direkte Partnerschaft oder vorgefertigte Integration zwischen Qbilon und Cisco ACI.</text:p>
      <text:p text:style-name="P5">Es gibt jedoch dieselben prinzipiellen Wege wie beim Network Node Manager:</text:p>
      <text:p text:style-name="P5"><text:span text:style-name="Strong_20_Emphasis">1. REST-API von Cisco ACI (APIC)</text:span> Cisco ACI stellt über seinen Application Policy Infrastructure Controller (APIC) eine vollständige REST-API bereit. Qbilon kann grundsätzlich jede Drittsoftware anbinden, die eine dokumentierte Web-API (z. B. REST oder SOAP) besitzt und ihre Daten in einem standardisierten, strukturierten Format liefert. Der Cisco APIC bietet genau das – eine REST-API über HTTPS (Port 443). Die Anbindung wäre über den <text:span text:style-name="Strong_20_Emphasis">Webhook Composer / JSON Importer</text:span> von Qbilon denkbar, erfordert aber manuelle Konfiguration. <text:a xlink:type="simple" xlink:href="https://www.qbilon.io/faqs/" office:target-frame-name="_blank" xlink:show="new" text:style-name="Internet_20_link" text:visited-style-name="Visited_20_Internet_20_Link">Qbilon</text:a></text:p>
      <text:p text:style-name="P5"><text:span text:style-name="Strong_20_Emphasis">2. Custom Tasks via Docker</text:span> Das „Custom Task"-Feature erlaubt es, beliebige Daten über selbst erstellte Docker-Tasks zu importieren, zu verarbeiten und zu exportieren. Damit ließe sich ein eigener Connector gegen die APIC-API entwickeln. <text:a xlink:type="simple" xlink:href="https://www.qbilon.io/faqs/" office:target-frame-name="_blank" xlink:show="new" text:style-name="Internet_20_link" text:visited-style-name="Visited_20_Internet_20_Link">Qbilon</text:a></text:p>
      <text:p text:style-name="P5"><text:span text:style-name="Strong_20_Emphasis">3. CSV-Export</text:span> Cisco ACI erlaubt den Export von Inventar- und Topologiedaten als CSV. CSV-Dateien werden von Qbilon direkt als Datenquelle unterstützt. <text:a xlink:type="simple" xlink:href="https://www.qbilon.io/list-of-connectors/" office:target-frame-name="_blank" xlink:show="new" text:style-name="Internet_20_link" text:visited-style-name="Visited_20_Internet_20_Link">Qbilon</text:a></text:p>
      <text:p text:style-name="P5"><text:span text:style-name="Strong_20_Emphasis">Empfehlung:</text:span> Da Qbilon auch „on demand"-Konnektoren entwickelt (wie bei Active Directory und ADOIT), lohnt sich eine direkte Anfrage bei Qbilon (<text:a xlink:type="simple" xlink:href="mailto:info@qbilon.io" text:style-name="Internet_20_link" text:visited-style-name="Visited_20_Internet_20_Link">info@qbilon.io</text:a> / +49 821 71 04 09 70 in Augsburg), ob ein ACI-Connector bereits in Entwicklung ist oder beauftragt werden kann. Eine Out-of-the-Box-Lösung existiert nach aktuellem Stand nicht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1"/><text:page-number text:select-page="current">3</text:page-number><text:s/>/ <text:page-count>3</text:page-count><text:bookmark-end text:name="PageNumWizard_FOOTER_Standard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5:42:36.858645714</meta:creation-date>
    <dc:title>myone</dc:title>
    <meta:editing-cycles>2</meta:editing-cycles>
    <meta:generator>LibreOffice/24.2.7.2$Linux_X86_64 LibreOffice_project/420$Build-2</meta:generator>
    <meta:editing-duration>PT2M16S</meta:editing-duration>
    <dc:date>2026-05-28T15:44:51.375447903</dc:date>
    <meta:document-statistic meta:table-count="0" meta:image-count="0" meta:object-count="0" meta:page-count="3" meta:paragraph-count="31" meta:word-count="810" meta:character-count="6537" meta:non-whitespace-character-count="5749"/>
    <meta:template xlink:type="simple" xlink:actuate="onRequest" xlink:title="myone" xlink:href="../../../Vorlagen/myone.ott" meta:date="2026-05-28T15:42:35.411767840"/>
  </office:meta>
</office:document-meta>
</file>