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D1000005540E2075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2681in" fo:margin-left="0.0014in" fo:margin-top="0in" fo:margin-bottom="0in" table:align="left" style:writing-mode="page"/>
    </style:style>
    <style:style style:name="Table1.A" style:family="table-column">
      <style:table-column-properties style:column-width="1.1451in"/>
    </style:style>
    <style:style style:name="Table1.B" style:family="table-column">
      <style:table-column-properties style:column-width="1.4931in"/>
    </style:style>
    <style:style style:name="Table1.C" style:family="table-column">
      <style:table-column-properties style:column-width="2.1042in"/>
    </style:style>
    <style:style style:name="Table1.D" style:family="table-column">
      <style:table-column-properties style:column-width="1.525in"/>
    </style:style>
    <style:style style:name="Table1.1" style:family="table-row">
      <style:table-row-properties fo:keep-together="auto"/>
    </style:style>
    <style:style style:name="Table1.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1.A2" style:family="table-cell">
      <style:table-cell-properties style:vertical-align="middle" fo:padding-left="0.0833in" fo:padding-right="0.0833in" fo:padding-top="0.0556in" fo:padding-bottom="0.0556in" fo:border="0.25pt solid #cbd2d9"/>
    </style:style>
    <style:style style:name="Table1.B2" style:family="table-cell">
      <style:table-cell-properties style:vertical-align="middle" fo:padding-left="0.0833in" fo:padding-right="0.0833in" fo:padding-top="0.0556in" fo:padding-bottom="0.0556in" fo:border="0.25pt solid #cbd2d9"/>
    </style:style>
    <style:style style:name="Table1.C2" style:family="table-cell">
      <style:table-cell-properties style:vertical-align="middle" fo:padding-left="0.0833in" fo:padding-right="0.0833in" fo:padding-top="0.0556in" fo:padding-bottom="0.0556in" fo:border="0.25pt solid #cbd2d9"/>
    </style:style>
    <style:style style:name="Table1.D2" style:family="table-cell">
      <style:table-cell-properties style:vertical-align="middle" fo:padding-left="0.0833in" fo:padding-right="0.0833in" fo:padding-top="0.0556in" fo:padding-bottom="0.0556in" fo:border="0.25pt solid #cbd2d9"/>
    </style:style>
    <style:style style:name="Table1.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1.A4" style:family="table-cell">
      <style:table-cell-properties style:vertical-align="middle" fo:padding-left="0.0833in" fo:padding-right="0.0833in" fo:padding-top="0.0556in" fo:padding-bottom="0.0556in" fo:border="0.25pt solid #cbd2d9"/>
    </style:style>
    <style:style style:name="Table1.B4" style:family="table-cell">
      <style:table-cell-properties style:vertical-align="middle" fo:padding-left="0.0833in" fo:padding-right="0.0833in" fo:padding-top="0.0556in" fo:padding-bottom="0.0556in" fo:border="0.25pt solid #cbd2d9"/>
    </style:style>
    <style:style style:name="Table1.C4" style:family="table-cell">
      <style:table-cell-properties style:vertical-align="middle" fo:padding-left="0.0833in" fo:padding-right="0.0833in" fo:padding-top="0.0556in" fo:padding-bottom="0.0556in" fo:border="0.25pt solid #cbd2d9"/>
    </style:style>
    <style:style style:name="Table1.D4" style:family="table-cell">
      <style:table-cell-properties style:vertical-align="middle" fo:padding-left="0.0833in" fo:padding-right="0.0833in" fo:padding-top="0.0556in" fo:padding-bottom="0.0556in" fo:border="0.25pt solid #cbd2d9"/>
    </style:style>
    <style:style style:name="Table1.A6" style:family="table-cell">
      <style:table-cell-properties style:vertical-align="middle" fo:padding-left="0.0833in" fo:padding-right="0.0833in" fo:padding-top="0.0556in" fo:padding-bottom="0.0556in" fo:border="0.25pt solid #cbd2d9"/>
    </style:style>
    <style:style style:name="Table1.B6" style:family="table-cell">
      <style:table-cell-properties style:vertical-align="middle" fo:padding-left="0.0833in" fo:padding-right="0.0833in" fo:padding-top="0.0556in" fo:padding-bottom="0.0556in" fo:border="0.25pt solid #cbd2d9"/>
    </style:style>
    <style:style style:name="Table1.C6" style:family="table-cell">
      <style:table-cell-properties style:vertical-align="middle" fo:padding-left="0.0833in" fo:padding-right="0.0833in" fo:padding-top="0.0556in" fo:padding-bottom="0.0556in" fo:border="0.25pt solid #cbd2d9"/>
    </style:style>
    <style:style style:name="Table1.D6" style:family="table-cell">
      <style:table-cell-properties style:vertical-align="middle" fo:padding-left="0.0833in" fo:padding-right="0.0833in" fo:padding-top="0.0556in" fo:padding-bottom="0.0556in" fo:border="0.25pt solid #cbd2d9"/>
    </style:style>
    <style:style style:name="Table1.A8" style:family="table-cell">
      <style:table-cell-properties style:vertical-align="middle" fo:padding-left="0.0833in" fo:padding-right="0.0833in" fo:padding-top="0.0556in" fo:padding-bottom="0.0556in" fo:border="0.25pt solid #cbd2d9"/>
    </style:style>
    <style:style style:name="Table1.B8" style:family="table-cell">
      <style:table-cell-properties style:vertical-align="middle" fo:padding-left="0.0833in" fo:padding-right="0.0833in" fo:padding-top="0.0556in" fo:padding-bottom="0.0556in" fo:border="0.25pt solid #cbd2d9"/>
    </style:style>
    <style:style style:name="Table1.C8" style:family="table-cell">
      <style:table-cell-properties style:vertical-align="middle" fo:padding-left="0.0833in" fo:padding-right="0.0833in" fo:padding-top="0.0556in" fo:padding-bottom="0.0556in" fo:border="0.25pt solid #cbd2d9"/>
    </style:style>
    <style:style style:name="Table1.D8" style:family="table-cell">
      <style:table-cell-properties style:vertical-align="middle" fo:padding-left="0.0833in" fo:padding-right="0.0833in" fo:padding-top="0.0556in" fo:padding-bottom="0.0556in" fo:border="0.25pt solid #cbd2d9"/>
    </style:style>
    <style:style style:name="Table1.A10" style:family="table-cell">
      <style:table-cell-properties style:vertical-align="middle" fo:padding-left="0.0833in" fo:padding-right="0.0833in" fo:padding-top="0.0556in" fo:padding-bottom="0.0556in" fo:border="0.25pt solid #cbd2d9"/>
    </style:style>
    <style:style style:name="Table1.B10" style:family="table-cell">
      <style:table-cell-properties style:vertical-align="middle" fo:padding-left="0.0833in" fo:padding-right="0.0833in" fo:padding-top="0.0556in" fo:padding-bottom="0.0556in" fo:border="0.25pt solid #cbd2d9"/>
    </style:style>
    <style:style style:name="Table1.C10" style:family="table-cell">
      <style:table-cell-properties style:vertical-align="middle" fo:padding-left="0.0833in" fo:padding-right="0.0833in" fo:padding-top="0.0556in" fo:padding-bottom="0.0556in" fo:border="0.25pt solid #cbd2d9"/>
    </style:style>
    <style:style style:name="Table1.D10" style:family="table-cell">
      <style:table-cell-properties style:vertical-align="middle" fo:padding-left="0.0833in" fo:padding-right="0.0833in" fo:padding-top="0.0556in" fo:padding-bottom="0.0556in" fo:border="0.25pt solid #cbd2d9"/>
    </style:style>
    <style:style style:name="Table1.A12" style:family="table-cell">
      <style:table-cell-properties style:vertical-align="middle" fo:padding-left="0.0833in" fo:padding-right="0.0833in" fo:padding-top="0.0556in" fo:padding-bottom="0.0556in" fo:border="0.25pt solid #cbd2d9"/>
    </style:style>
    <style:style style:name="Table1.B12" style:family="table-cell">
      <style:table-cell-properties style:vertical-align="middle" fo:padding-left="0.0833in" fo:padding-right="0.0833in" fo:padding-top="0.0556in" fo:padding-bottom="0.0556in" fo:border="0.25pt solid #cbd2d9"/>
    </style:style>
    <style:style style:name="Table1.C12" style:family="table-cell">
      <style:table-cell-properties style:vertical-align="middle" fo:padding-left="0.0833in" fo:padding-right="0.0833in" fo:padding-top="0.0556in" fo:padding-bottom="0.0556in" fo:border="0.25pt solid #cbd2d9"/>
    </style:style>
    <style:style style:name="Table1.D12" style:family="table-cell">
      <style:table-cell-properties style:vertical-align="middle" fo:padding-left="0.0833in" fo:padding-right="0.0833in" fo:padding-top="0.0556in" fo:padding-bottom="0.0556in" fo:border="0.25pt solid #cbd2d9"/>
    </style:style>
    <style:style style:name="Table1.A14" style:family="table-cell">
      <style:table-cell-properties style:vertical-align="middle" fo:padding-left="0.0833in" fo:padding-right="0.0833in" fo:padding-top="0.0556in" fo:padding-bottom="0.0556in" fo:border="0.25pt solid #cbd2d9"/>
    </style:style>
    <style:style style:name="Table1.B14" style:family="table-cell">
      <style:table-cell-properties style:vertical-align="middle" fo:padding-left="0.0833in" fo:padding-right="0.0833in" fo:padding-top="0.0556in" fo:padding-bottom="0.0556in" fo:border="0.25pt solid #cbd2d9"/>
    </style:style>
    <style:style style:name="Table1.C14" style:family="table-cell">
      <style:table-cell-properties style:vertical-align="middle" fo:padding-left="0.0833in" fo:padding-right="0.0833in" fo:padding-top="0.0556in" fo:padding-bottom="0.0556in" fo:border="0.25pt solid #cbd2d9"/>
    </style:style>
    <style:style style:name="Table1.D14" style:family="table-cell">
      <style:table-cell-properties style:vertical-align="middle" fo:padding-left="0.0833in" fo:padding-right="0.0833in" fo:padding-top="0.0556in" fo:padding-bottom="0.0556in" fo:border="0.25pt solid #cbd2d9"/>
    </style:style>
    <style:style style:name="Table1.A16" style:family="table-cell">
      <style:table-cell-properties style:vertical-align="middle" fo:padding-left="0.0833in" fo:padding-right="0.0833in" fo:padding-top="0.0556in" fo:padding-bottom="0.0556in" fo:border="0.25pt solid #cbd2d9"/>
    </style:style>
    <style:style style:name="Table1.B16" style:family="table-cell">
      <style:table-cell-properties style:vertical-align="middle" fo:padding-left="0.0833in" fo:padding-right="0.0833in" fo:padding-top="0.0556in" fo:padding-bottom="0.0556in" fo:border="0.25pt solid #cbd2d9"/>
    </style:style>
    <style:style style:name="Table1.C16" style:family="table-cell">
      <style:table-cell-properties style:vertical-align="middle" fo:padding-left="0.0833in" fo:padding-right="0.0833in" fo:padding-top="0.0556in" fo:padding-bottom="0.0556in" fo:border="0.25pt solid #cbd2d9"/>
    </style:style>
    <style:style style:name="Table1.D16" style:family="table-cell">
      <style:table-cell-properties style:vertical-align="middle" fo:padding-left="0.0833in" fo:padding-right="0.0833in" fo:padding-top="0.0556in" fo:padding-bottom="0.0556in" fo:border="0.25pt solid #cbd2d9"/>
    </style:style>
    <style:style style:name="Table1.A18" style:family="table-cell">
      <style:table-cell-properties style:vertical-align="middle" fo:padding-left="0.0833in" fo:padding-right="0.0833in" fo:padding-top="0.0556in" fo:padding-bottom="0.0556in" fo:border="0.25pt solid #cbd2d9"/>
    </style:style>
    <style:style style:name="Table1.B18" style:family="table-cell">
      <style:table-cell-properties style:vertical-align="middle" fo:padding-left="0.0833in" fo:padding-right="0.0833in" fo:padding-top="0.0556in" fo:padding-bottom="0.0556in" fo:border="0.25pt solid #cbd2d9"/>
    </style:style>
    <style:style style:name="Table1.C18" style:family="table-cell">
      <style:table-cell-properties style:vertical-align="middle" fo:padding-left="0.0833in" fo:padding-right="0.0833in" fo:padding-top="0.0556in" fo:padding-bottom="0.0556in" fo:border="0.25pt solid #cbd2d9"/>
    </style:style>
    <style:style style:name="Table1.D18" style:family="table-cell">
      <style:table-cell-properties style:vertical-align="middle" fo:padding-left="0.0833in" fo:padding-right="0.0833in" fo:padding-top="0.0556in" fo:padding-bottom="0.0556in" fo:border="0.25pt solid #cbd2d9"/>
    </style:style>
    <style:style style:name="Table1.A20" style:family="table-cell">
      <style:table-cell-properties style:vertical-align="middle" fo:padding-left="0.0833in" fo:padding-right="0.0833in" fo:padding-top="0.0556in" fo:padding-bottom="0.0556in" fo:border="0.25pt solid #cbd2d9"/>
    </style:style>
    <style:style style:name="Table1.B20" style:family="table-cell">
      <style:table-cell-properties style:vertical-align="middle" fo:padding-left="0.0833in" fo:padding-right="0.0833in" fo:padding-top="0.0556in" fo:padding-bottom="0.0556in" fo:border="0.25pt solid #cbd2d9"/>
    </style:style>
    <style:style style:name="Table1.C20" style:family="table-cell">
      <style:table-cell-properties style:vertical-align="middle" fo:padding-left="0.0833in" fo:padding-right="0.0833in" fo:padding-top="0.0556in" fo:padding-bottom="0.0556in" fo:border="0.25pt solid #cbd2d9"/>
    </style:style>
    <style:style style:name="Table1.D20" style:family="table-cell">
      <style:table-cell-properties style:vertical-align="middle" fo:padding-left="0.0833in" fo:padding-right="0.0833in" fo:padding-top="0.0556in" fo:padding-bottom="0.0556in" fo:border="0.25pt solid #cbd2d9"/>
    </style:style>
    <style:style style:name="Table2" style:family="table">
      <style:table-properties style:width="6.2681in" fo:margin-left="0.0014in" fo:margin-top="0in" fo:margin-bottom="0in" table:align="left" style:writing-mode="page"/>
    </style:style>
    <style:style style:name="Table2.A" style:family="table-column">
      <style:table-column-properties style:column-width="1.2535in"/>
    </style:style>
    <style:style style:name="Table2.B" style:family="table-column">
      <style:table-column-properties style:column-width="2.5063in"/>
    </style:style>
    <style:style style:name="Table2.C" style:family="table-column">
      <style:table-column-properties style:column-width="2.5083in"/>
    </style:style>
    <style:style style:name="Table2.1" style:family="table-row">
      <style:table-row-properties fo:keep-together="auto"/>
    </style:style>
    <style:style style:name="Table2.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2.A2" style:family="table-cell">
      <style:table-cell-properties style:vertical-align="middle" fo:padding-left="0.0833in" fo:padding-right="0.0833in" fo:padding-top="0.0556in" fo:padding-bottom="0.0556in" fo:border="0.25pt solid #cbd2d9"/>
    </style:style>
    <style:style style:name="Table2.B2" style:family="table-cell">
      <style:table-cell-properties style:vertical-align="middle" fo:padding-left="0.0833in" fo:padding-right="0.0833in" fo:padding-top="0.0556in" fo:padding-bottom="0.0556in" fo:border="0.25pt solid #cbd2d9"/>
    </style:style>
    <style:style style:name="Table2.C2" style:family="table-cell">
      <style:table-cell-properties style:vertical-align="middle" fo:padding-left="0.0833in" fo:padding-right="0.0833in" fo:padding-top="0.0556in" fo:padding-bottom="0.0556in" fo:border="0.25pt solid #cbd2d9"/>
    </style:style>
    <style:style style:name="Table2.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2.A4" style:family="table-cell">
      <style:table-cell-properties style:vertical-align="middle" fo:padding-left="0.0833in" fo:padding-right="0.0833in" fo:padding-top="0.0556in" fo:padding-bottom="0.0556in" fo:border="0.25pt solid #cbd2d9"/>
    </style:style>
    <style:style style:name="Table2.B4" style:family="table-cell">
      <style:table-cell-properties style:vertical-align="middle" fo:padding-left="0.0833in" fo:padding-right="0.0833in" fo:padding-top="0.0556in" fo:padding-bottom="0.0556in" fo:border="0.25pt solid #cbd2d9"/>
    </style:style>
    <style:style style:name="Table2.C4" style:family="table-cell">
      <style:table-cell-properties style:vertical-align="middle" fo:padding-left="0.0833in" fo:padding-right="0.0833in" fo:padding-top="0.0556in" fo:padding-bottom="0.0556in" fo:border="0.25pt solid #cbd2d9"/>
    </style:style>
    <style:style style:name="Table2.A6" style:family="table-cell">
      <style:table-cell-properties style:vertical-align="middle" fo:padding-left="0.0833in" fo:padding-right="0.0833in" fo:padding-top="0.0556in" fo:padding-bottom="0.0556in" fo:border="0.25pt solid #cbd2d9"/>
    </style:style>
    <style:style style:name="Table2.B6" style:family="table-cell">
      <style:table-cell-properties style:vertical-align="middle" fo:padding-left="0.0833in" fo:padding-right="0.0833in" fo:padding-top="0.0556in" fo:padding-bottom="0.0556in" fo:border="0.25pt solid #cbd2d9"/>
    </style:style>
    <style:style style:name="Table2.C6" style:family="table-cell">
      <style:table-cell-properties style:vertical-align="middle" fo:padding-left="0.0833in" fo:padding-right="0.0833in" fo:padding-top="0.0556in" fo:padding-bottom="0.0556in" fo:border="0.25pt solid #cbd2d9"/>
    </style:style>
    <style:style style:name="Table2.A8" style:family="table-cell">
      <style:table-cell-properties style:vertical-align="middle" fo:padding-left="0.0833in" fo:padding-right="0.0833in" fo:padding-top="0.0556in" fo:padding-bottom="0.0556in" fo:border="0.25pt solid #cbd2d9"/>
    </style:style>
    <style:style style:name="Table2.B8" style:family="table-cell">
      <style:table-cell-properties style:vertical-align="middle" fo:padding-left="0.0833in" fo:padding-right="0.0833in" fo:padding-top="0.0556in" fo:padding-bottom="0.0556in" fo:border="0.25pt solid #cbd2d9"/>
    </style:style>
    <style:style style:name="Table2.C8" style:family="table-cell">
      <style:table-cell-properties style:vertical-align="middle" fo:padding-left="0.0833in" fo:padding-right="0.0833in" fo:padding-top="0.0556in" fo:padding-bottom="0.0556in" fo:border="0.25pt solid #cbd2d9"/>
    </style:style>
    <style:style style:name="Table3" style:family="table">
      <style:table-properties style:width="6.2681in" fo:margin-left="0.0014in" fo:margin-top="0in" fo:margin-bottom="0in" table:align="left" style:writing-mode="page"/>
    </style:style>
    <style:style style:name="Table3.A" style:family="table-column">
      <style:table-column-properties style:column-width="0.9396in"/>
    </style:style>
    <style:style style:name="Table3.B" style:family="table-column">
      <style:table-column-properties style:column-width="1.2542in"/>
    </style:style>
    <style:style style:name="Table3.C" style:family="table-column">
      <style:table-column-properties style:column-width="1.8799in"/>
    </style:style>
    <style:style style:name="Table3.D" style:family="table-column">
      <style:table-column-properties style:column-width="2.1938in"/>
    </style:style>
    <style:style style:name="Table3.1" style:family="table-row">
      <style:table-row-properties fo:keep-together="auto"/>
    </style:style>
    <style:style style:name="Table3.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3.A2" style:family="table-cell">
      <style:table-cell-properties style:vertical-align="middle" fo:padding-left="0.0833in" fo:padding-right="0.0833in" fo:padding-top="0.0556in" fo:padding-bottom="0.0556in" fo:border="0.25pt solid #cbd2d9"/>
    </style:style>
    <style:style style:name="Table3.B2" style:family="table-cell">
      <style:table-cell-properties style:vertical-align="middle" fo:padding-left="0.0833in" fo:padding-right="0.0833in" fo:padding-top="0.0556in" fo:padding-bottom="0.0556in" fo:border="0.25pt solid #cbd2d9"/>
    </style:style>
    <style:style style:name="Table3.C2" style:family="table-cell">
      <style:table-cell-properties style:vertical-align="middle" fo:padding-left="0.0833in" fo:padding-right="0.0833in" fo:padding-top="0.0556in" fo:padding-bottom="0.0556in" fo:border="0.25pt solid #cbd2d9"/>
    </style:style>
    <style:style style:name="Table3.D2" style:family="table-cell">
      <style:table-cell-properties style:vertical-align="middle" fo:padding-left="0.0833in" fo:padding-right="0.0833in" fo:padding-top="0.0556in" fo:padding-bottom="0.0556in" fo:border="0.25pt solid #cbd2d9"/>
    </style:style>
    <style:style style:name="Table3.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3.A4" style:family="table-cell">
      <style:table-cell-properties style:vertical-align="middle" fo:padding-left="0.0833in" fo:padding-right="0.0833in" fo:padding-top="0.0556in" fo:padding-bottom="0.0556in" fo:border="0.25pt solid #cbd2d9"/>
    </style:style>
    <style:style style:name="Table3.B4" style:family="table-cell">
      <style:table-cell-properties style:vertical-align="middle" fo:padding-left="0.0833in" fo:padding-right="0.0833in" fo:padding-top="0.0556in" fo:padding-bottom="0.0556in" fo:border="0.25pt solid #cbd2d9"/>
    </style:style>
    <style:style style:name="Table3.C4" style:family="table-cell">
      <style:table-cell-properties style:vertical-align="middle" fo:padding-left="0.0833in" fo:padding-right="0.0833in" fo:padding-top="0.0556in" fo:padding-bottom="0.0556in" fo:border="0.25pt solid #cbd2d9"/>
    </style:style>
    <style:style style:name="Table3.D4" style:family="table-cell">
      <style:table-cell-properties style:vertical-align="middle" fo:padding-left="0.0833in" fo:padding-right="0.0833in" fo:padding-top="0.0556in" fo:padding-bottom="0.0556in" fo:border="0.25pt solid #cbd2d9"/>
    </style:style>
    <style:style style:name="Table3.A6" style:family="table-cell">
      <style:table-cell-properties style:vertical-align="middle" fo:padding-left="0.0833in" fo:padding-right="0.0833in" fo:padding-top="0.0556in" fo:padding-bottom="0.0556in" fo:border="0.25pt solid #cbd2d9"/>
    </style:style>
    <style:style style:name="Table3.B6" style:family="table-cell">
      <style:table-cell-properties style:vertical-align="middle" fo:padding-left="0.0833in" fo:padding-right="0.0833in" fo:padding-top="0.0556in" fo:padding-bottom="0.0556in" fo:border="0.25pt solid #cbd2d9"/>
    </style:style>
    <style:style style:name="Table3.C6" style:family="table-cell">
      <style:table-cell-properties style:vertical-align="middle" fo:padding-left="0.0833in" fo:padding-right="0.0833in" fo:padding-top="0.0556in" fo:padding-bottom="0.0556in" fo:border="0.25pt solid #cbd2d9"/>
    </style:style>
    <style:style style:name="Table3.D6" style:family="table-cell">
      <style:table-cell-properties style:vertical-align="middle" fo:padding-left="0.0833in" fo:padding-right="0.0833in" fo:padding-top="0.0556in" fo:padding-bottom="0.0556in" fo:border="0.25pt solid #cbd2d9"/>
    </style:style>
    <style:style style:name="Table4" style:family="table">
      <style:table-properties style:width="6.2681in" fo:margin-left="0.0014in" fo:margin-top="0in" fo:margin-bottom="0in" table:align="left" style:writing-mode="page"/>
    </style:style>
    <style:style style:name="Table4.A" style:family="table-column">
      <style:table-column-properties style:column-width="1.3785in"/>
    </style:style>
    <style:style style:name="Table4.B" style:family="table-column">
      <style:table-column-properties style:column-width="1.7556in"/>
    </style:style>
    <style:style style:name="Table4.C" style:family="table-column">
      <style:table-column-properties style:column-width="1.2535in"/>
    </style:style>
    <style:style style:name="Table4.D" style:family="table-column">
      <style:table-column-properties style:column-width="1.8799in"/>
    </style:style>
    <style:style style:name="Table4.1" style:family="table-row">
      <style:table-row-properties fo:keep-together="auto"/>
    </style:style>
    <style:style style:name="Table4.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4.A2" style:family="table-cell">
      <style:table-cell-properties style:vertical-align="middle" fo:padding-left="0.0833in" fo:padding-right="0.0833in" fo:padding-top="0.0556in" fo:padding-bottom="0.0556in" fo:border="0.25pt solid #cbd2d9"/>
    </style:style>
    <style:style style:name="Table4.B2" style:family="table-cell">
      <style:table-cell-properties style:vertical-align="middle" fo:padding-left="0.0833in" fo:padding-right="0.0833in" fo:padding-top="0.0556in" fo:padding-bottom="0.0556in" fo:border="0.25pt solid #cbd2d9"/>
    </style:style>
    <style:style style:name="Table4.C2" style:family="table-cell">
      <style:table-cell-properties style:vertical-align="middle" fo:padding-left="0.0833in" fo:padding-right="0.0833in" fo:padding-top="0.0556in" fo:padding-bottom="0.0556in" fo:border="0.25pt solid #cbd2d9"/>
    </style:style>
    <style:style style:name="Table4.D2" style:family="table-cell">
      <style:table-cell-properties style:vertical-align="middle" fo:padding-left="0.0833in" fo:padding-right="0.0833in" fo:padding-top="0.0556in" fo:padding-bottom="0.0556in" fo:border="0.25pt solid #cbd2d9"/>
    </style:style>
    <style:style style:name="Table4.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4.A4" style:family="table-cell">
      <style:table-cell-properties style:vertical-align="middle" fo:padding-left="0.0833in" fo:padding-right="0.0833in" fo:padding-top="0.0556in" fo:padding-bottom="0.0556in" fo:border="0.25pt solid #cbd2d9"/>
    </style:style>
    <style:style style:name="Table4.B4" style:family="table-cell">
      <style:table-cell-properties style:vertical-align="middle" fo:padding-left="0.0833in" fo:padding-right="0.0833in" fo:padding-top="0.0556in" fo:padding-bottom="0.0556in" fo:border="0.25pt solid #cbd2d9"/>
    </style:style>
    <style:style style:name="Table4.C4" style:family="table-cell">
      <style:table-cell-properties style:vertical-align="middle" fo:padding-left="0.0833in" fo:padding-right="0.0833in" fo:padding-top="0.0556in" fo:padding-bottom="0.0556in" fo:border="0.25pt solid #cbd2d9"/>
    </style:style>
    <style:style style:name="Table4.D4" style:family="table-cell">
      <style:table-cell-properties style:vertical-align="middle" fo:padding-left="0.0833in" fo:padding-right="0.0833in" fo:padding-top="0.0556in" fo:padding-bottom="0.0556in" fo:border="0.25pt solid #cbd2d9"/>
    </style:style>
    <style:style style:name="Table4.A6" style:family="table-cell">
      <style:table-cell-properties style:vertical-align="middle" fo:padding-left="0.0833in" fo:padding-right="0.0833in" fo:padding-top="0.0556in" fo:padding-bottom="0.0556in" fo:border="0.25pt solid #cbd2d9"/>
    </style:style>
    <style:style style:name="Table4.B6" style:family="table-cell">
      <style:table-cell-properties style:vertical-align="middle" fo:padding-left="0.0833in" fo:padding-right="0.0833in" fo:padding-top="0.0556in" fo:padding-bottom="0.0556in" fo:border="0.25pt solid #cbd2d9"/>
    </style:style>
    <style:style style:name="Table4.C6" style:family="table-cell">
      <style:table-cell-properties style:vertical-align="middle" fo:padding-left="0.0833in" fo:padding-right="0.0833in" fo:padding-top="0.0556in" fo:padding-bottom="0.0556in" fo:border="0.25pt solid #cbd2d9"/>
    </style:style>
    <style:style style:name="Table4.D6" style:family="table-cell">
      <style:table-cell-properties style:vertical-align="middle" fo:padding-left="0.0833in" fo:padding-right="0.0833in" fo:padding-top="0.0556in" fo:padding-bottom="0.0556in" fo:border="0.25pt solid #cbd2d9"/>
    </style:style>
    <style:style style:name="Table5" style:family="table">
      <style:table-properties style:width="6.2681in" fo:margin-left="0.0014in" fo:margin-top="0in" fo:margin-bottom="0in" table:align="left" style:writing-mode="page"/>
    </style:style>
    <style:style style:name="Table5.A" style:family="table-column">
      <style:table-column-properties style:column-width="1.2535in"/>
    </style:style>
    <style:style style:name="Table5.B" style:family="table-column">
      <style:table-column-properties style:column-width="2.1938in"/>
    </style:style>
    <style:style style:name="Table5.C" style:family="table-column">
      <style:table-column-properties style:column-width="2.8208in"/>
    </style:style>
    <style:style style:name="Table5.1" style:family="table-row">
      <style:table-row-properties fo:keep-together="auto"/>
    </style:style>
    <style:style style:name="Table5.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5.A2" style:family="table-cell">
      <style:table-cell-properties style:vertical-align="middle" fo:padding-left="0.0833in" fo:padding-right="0.0833in" fo:padding-top="0.0556in" fo:padding-bottom="0.0556in" fo:border="0.25pt solid #cbd2d9"/>
    </style:style>
    <style:style style:name="Table5.B2" style:family="table-cell">
      <style:table-cell-properties style:vertical-align="middle" fo:padding-left="0.0833in" fo:padding-right="0.0833in" fo:padding-top="0.0556in" fo:padding-bottom="0.0556in" fo:border="0.25pt solid #cbd2d9"/>
    </style:style>
    <style:style style:name="Table5.C2" style:family="table-cell">
      <style:table-cell-properties style:vertical-align="middle" fo:padding-left="0.0833in" fo:padding-right="0.0833in" fo:padding-top="0.0556in" fo:padding-bottom="0.0556in" fo:border="0.25pt solid #cbd2d9"/>
    </style:style>
    <style:style style:name="Table5.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5.A4" style:family="table-cell">
      <style:table-cell-properties style:vertical-align="middle" fo:padding-left="0.0833in" fo:padding-right="0.0833in" fo:padding-top="0.0556in" fo:padding-bottom="0.0556in" fo:border="0.25pt solid #cbd2d9"/>
    </style:style>
    <style:style style:name="Table5.B4" style:family="table-cell">
      <style:table-cell-properties style:vertical-align="middle" fo:padding-left="0.0833in" fo:padding-right="0.0833in" fo:padding-top="0.0556in" fo:padding-bottom="0.0556in" fo:border="0.25pt solid #cbd2d9"/>
    </style:style>
    <style:style style:name="Table5.C4" style:family="table-cell">
      <style:table-cell-properties style:vertical-align="middle" fo:padding-left="0.0833in" fo:padding-right="0.0833in" fo:padding-top="0.0556in" fo:padding-bottom="0.0556in" fo:border="0.25pt solid #cbd2d9"/>
    </style:style>
    <style:style style:name="Table6" style:family="table">
      <style:table-properties style:width="6.2681in" fo:margin-left="0.0014in" fo:margin-top="0in" fo:margin-bottom="0in" table:align="left" style:writing-mode="page"/>
    </style:style>
    <style:style style:name="Table6.A" style:family="table-column">
      <style:table-column-properties style:column-width="1.2535in"/>
    </style:style>
    <style:style style:name="Table6.B" style:family="table-column">
      <style:table-column-properties style:column-width="2.5069in"/>
    </style:style>
    <style:style style:name="Table6.C" style:family="table-column">
      <style:table-column-properties style:column-width="2.5076in"/>
    </style:style>
    <style:style style:name="Table6.1" style:family="table-row">
      <style:table-row-properties fo:keep-together="auto"/>
    </style:style>
    <style:style style:name="Table6.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6.A2" style:family="table-cell">
      <style:table-cell-properties style:vertical-align="middle" fo:padding-left="0.0833in" fo:padding-right="0.0833in" fo:padding-top="0.0556in" fo:padding-bottom="0.0556in" fo:border="0.25pt solid #cbd2d9"/>
    </style:style>
    <style:style style:name="Table6.B2" style:family="table-cell">
      <style:table-cell-properties style:vertical-align="middle" fo:padding-left="0.0833in" fo:padding-right="0.0833in" fo:padding-top="0.0556in" fo:padding-bottom="0.0556in" fo:border="0.25pt solid #cbd2d9"/>
    </style:style>
    <style:style style:name="Table6.C2" style:family="table-cell">
      <style:table-cell-properties style:vertical-align="middle" fo:padding-left="0.0833in" fo:padding-right="0.0833in" fo:padding-top="0.0556in" fo:padding-bottom="0.0556in" fo:border="0.25pt solid #cbd2d9"/>
    </style:style>
    <style:style style:name="Table6.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6.A4" style:family="table-cell">
      <style:table-cell-properties style:vertical-align="middle" fo:padding-left="0.0833in" fo:padding-right="0.0833in" fo:padding-top="0.0556in" fo:padding-bottom="0.0556in" fo:border="0.25pt solid #cbd2d9"/>
    </style:style>
    <style:style style:name="Table6.B4" style:family="table-cell">
      <style:table-cell-properties style:vertical-align="middle" fo:padding-left="0.0833in" fo:padding-right="0.0833in" fo:padding-top="0.0556in" fo:padding-bottom="0.0556in" fo:border="0.25pt solid #cbd2d9"/>
    </style:style>
    <style:style style:name="Table6.C4" style:family="table-cell">
      <style:table-cell-properties style:vertical-align="middle" fo:padding-left="0.0833in" fo:padding-right="0.0833in" fo:padding-top="0.0556in" fo:padding-bottom="0.0556in" fo:border="0.25pt solid #cbd2d9"/>
    </style:style>
    <style:style style:name="Table7" style:family="table">
      <style:table-properties style:width="6.2681in" fo:margin-left="0.0014in" fo:margin-top="0in" fo:margin-bottom="0in" table:align="left" style:writing-mode="page"/>
    </style:style>
    <style:style style:name="Table7.A" style:family="table-column">
      <style:table-column-properties style:column-width="1.2535in"/>
    </style:style>
    <style:style style:name="Table7.B" style:family="table-column">
      <style:table-column-properties style:column-width="2.5063in"/>
    </style:style>
    <style:style style:name="Table7.C" style:family="table-column">
      <style:table-column-properties style:column-width="2.5083in"/>
    </style:style>
    <style:style style:name="Table7.1" style:family="table-row">
      <style:table-row-properties fo:keep-together="auto"/>
    </style:style>
    <style:style style:name="Table7.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7.A2" style:family="table-cell">
      <style:table-cell-properties style:vertical-align="middle" fo:padding-left="0.0833in" fo:padding-right="0.0833in" fo:padding-top="0.0556in" fo:padding-bottom="0.0556in" fo:border="0.25pt solid #cbd2d9"/>
    </style:style>
    <style:style style:name="Table7.B2" style:family="table-cell">
      <style:table-cell-properties style:vertical-align="middle" fo:padding-left="0.0833in" fo:padding-right="0.0833in" fo:padding-top="0.0556in" fo:padding-bottom="0.0556in" fo:border="0.25pt solid #cbd2d9"/>
    </style:style>
    <style:style style:name="Table7.C2" style:family="table-cell">
      <style:table-cell-properties style:vertical-align="middle" fo:padding-left="0.0833in" fo:padding-right="0.0833in" fo:padding-top="0.0556in" fo:padding-bottom="0.0556in" fo:border="0.25pt solid #cbd2d9"/>
    </style:style>
    <style:style style:name="Table7.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7.A4" style:family="table-cell">
      <style:table-cell-properties style:vertical-align="middle" fo:padding-left="0.0833in" fo:padding-right="0.0833in" fo:padding-top="0.0556in" fo:padding-bottom="0.0556in" fo:border="0.25pt solid #cbd2d9"/>
    </style:style>
    <style:style style:name="Table7.B4" style:family="table-cell">
      <style:table-cell-properties style:vertical-align="middle" fo:padding-left="0.0833in" fo:padding-right="0.0833in" fo:padding-top="0.0556in" fo:padding-bottom="0.0556in" fo:border="0.25pt solid #cbd2d9"/>
    </style:style>
    <style:style style:name="Table7.C4" style:family="table-cell">
      <style:table-cell-properties style:vertical-align="middle" fo:padding-left="0.0833in" fo:padding-right="0.0833in" fo:padding-top="0.0556in" fo:padding-bottom="0.0556in" fo:border="0.25pt solid #cbd2d9"/>
    </style:style>
    <style:style style:name="Table8" style:family="table">
      <style:table-properties style:width="6.2681in" fo:margin-left="0.0014in" fo:margin-top="0in" fo:margin-bottom="0in" table:align="left" style:writing-mode="page"/>
    </style:style>
    <style:style style:name="Table8.A" style:family="table-column">
      <style:table-column-properties style:column-width="0.5014in"/>
    </style:style>
    <style:style style:name="Table8.B" style:family="table-column">
      <style:table-column-properties style:column-width="0.9396in"/>
    </style:style>
    <style:style style:name="Table8.C" style:family="table-column">
      <style:table-column-properties style:column-width="3.5729in"/>
    </style:style>
    <style:style style:name="Table8.D" style:family="table-column">
      <style:table-column-properties style:column-width="1.2535in"/>
    </style:style>
    <style:style style:name="Table8.1" style:family="table-row">
      <style:table-row-properties fo:keep-together="auto"/>
    </style:style>
    <style:style style:name="Table8.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8.A2" style:family="table-cell">
      <style:table-cell-properties style:vertical-align="middle" fo:padding-left="0.0833in" fo:padding-right="0.0833in" fo:padding-top="0.0556in" fo:padding-bottom="0.0556in" fo:border="0.25pt solid #cbd2d9"/>
    </style:style>
    <style:style style:name="Table8.B2" style:family="table-cell">
      <style:table-cell-properties style:vertical-align="middle" fo:padding-left="0.0833in" fo:padding-right="0.0833in" fo:padding-top="0.0556in" fo:padding-bottom="0.0556in" fo:border="0.25pt solid #cbd2d9"/>
    </style:style>
    <style:style style:name="Table8.C2" style:family="table-cell">
      <style:table-cell-properties style:vertical-align="middle" fo:padding-left="0.0833in" fo:padding-right="0.0833in" fo:padding-top="0.0556in" fo:padding-bottom="0.0556in" fo:border="0.25pt solid #cbd2d9"/>
    </style:style>
    <style:style style:name="Table8.D2" style:family="table-cell">
      <style:table-cell-properties style:vertical-align="middle" fo:padding-left="0.0833in" fo:padding-right="0.0833in" fo:padding-top="0.0556in" fo:padding-bottom="0.0556in" fo:border="0.25pt solid #cbd2d9"/>
    </style:style>
    <style:style style:name="Table8.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8.A4" style:family="table-cell">
      <style:table-cell-properties style:vertical-align="middle" fo:padding-left="0.0833in" fo:padding-right="0.0833in" fo:padding-top="0.0556in" fo:padding-bottom="0.0556in" fo:border="0.25pt solid #cbd2d9"/>
    </style:style>
    <style:style style:name="Table8.B4" style:family="table-cell">
      <style:table-cell-properties style:vertical-align="middle" fo:padding-left="0.0833in" fo:padding-right="0.0833in" fo:padding-top="0.0556in" fo:padding-bottom="0.0556in" fo:border="0.25pt solid #cbd2d9"/>
    </style:style>
    <style:style style:name="Table8.C4" style:family="table-cell">
      <style:table-cell-properties style:vertical-align="middle" fo:padding-left="0.0833in" fo:padding-right="0.0833in" fo:padding-top="0.0556in" fo:padding-bottom="0.0556in" fo:border="0.25pt solid #cbd2d9"/>
    </style:style>
    <style:style style:name="Table8.D4" style:family="table-cell">
      <style:table-cell-properties style:vertical-align="middle" fo:padding-left="0.0833in" fo:padding-right="0.0833in" fo:padding-top="0.0556in" fo:padding-bottom="0.0556in" fo:border="0.25pt solid #cbd2d9"/>
    </style:style>
    <style:style style:name="Table8.A6" style:family="table-cell">
      <style:table-cell-properties style:vertical-align="middle" fo:padding-left="0.0833in" fo:padding-right="0.0833in" fo:padding-top="0.0556in" fo:padding-bottom="0.0556in" fo:border="0.25pt solid #cbd2d9"/>
    </style:style>
    <style:style style:name="Table8.B6" style:family="table-cell">
      <style:table-cell-properties style:vertical-align="middle" fo:padding-left="0.0833in" fo:padding-right="0.0833in" fo:padding-top="0.0556in" fo:padding-bottom="0.0556in" fo:border="0.25pt solid #cbd2d9"/>
    </style:style>
    <style:style style:name="Table8.C6" style:family="table-cell">
      <style:table-cell-properties style:vertical-align="middle" fo:padding-left="0.0833in" fo:padding-right="0.0833in" fo:padding-top="0.0556in" fo:padding-bottom="0.0556in" fo:border="0.25pt solid #cbd2d9"/>
    </style:style>
    <style:style style:name="Table8.D6" style:family="table-cell">
      <style:table-cell-properties style:vertical-align="middle" fo:padding-left="0.0833in" fo:padding-right="0.0833in" fo:padding-top="0.0556in" fo:padding-bottom="0.0556in" fo:border="0.25pt solid #cbd2d9"/>
    </style:style>
    <style:style style:name="Table8.A8" style:family="table-cell">
      <style:table-cell-properties style:vertical-align="middle" fo:padding-left="0.0833in" fo:padding-right="0.0833in" fo:padding-top="0.0556in" fo:padding-bottom="0.0556in" fo:border="0.25pt solid #cbd2d9"/>
    </style:style>
    <style:style style:name="Table8.B8" style:family="table-cell">
      <style:table-cell-properties style:vertical-align="middle" fo:padding-left="0.0833in" fo:padding-right="0.0833in" fo:padding-top="0.0556in" fo:padding-bottom="0.0556in" fo:border="0.25pt solid #cbd2d9"/>
    </style:style>
    <style:style style:name="Table8.C8" style:family="table-cell">
      <style:table-cell-properties style:vertical-align="middle" fo:padding-left="0.0833in" fo:padding-right="0.0833in" fo:padding-top="0.0556in" fo:padding-bottom="0.0556in" fo:border="0.25pt solid #cbd2d9"/>
    </style:style>
    <style:style style:name="Table8.D8" style:family="table-cell">
      <style:table-cell-properties style:vertical-align="middle" fo:padding-left="0.0833in" fo:padding-right="0.0833in" fo:padding-top="0.0556in" fo:padding-bottom="0.0556in" fo:border="0.25pt solid #cbd2d9"/>
    </style:style>
    <style:style style:name="Table8.A10" style:family="table-cell">
      <style:table-cell-properties style:vertical-align="middle" fo:padding-left="0.0833in" fo:padding-right="0.0833in" fo:padding-top="0.0556in" fo:padding-bottom="0.0556in" fo:border="0.25pt solid #cbd2d9"/>
    </style:style>
    <style:style style:name="Table8.B10" style:family="table-cell">
      <style:table-cell-properties style:vertical-align="middle" fo:padding-left="0.0833in" fo:padding-right="0.0833in" fo:padding-top="0.0556in" fo:padding-bottom="0.0556in" fo:border="0.25pt solid #cbd2d9"/>
    </style:style>
    <style:style style:name="Table8.C10" style:family="table-cell">
      <style:table-cell-properties style:vertical-align="middle" fo:padding-left="0.0833in" fo:padding-right="0.0833in" fo:padding-top="0.0556in" fo:padding-bottom="0.0556in" fo:border="0.25pt solid #cbd2d9"/>
    </style:style>
    <style:style style:name="Table8.D10" style:family="table-cell">
      <style:table-cell-properties style:vertical-align="middle" fo:padding-left="0.0833in" fo:padding-right="0.0833in" fo:padding-top="0.0556in" fo:padding-bottom="0.0556in" fo:border="0.25pt solid #cbd2d9"/>
    </style:style>
    <style:style style:name="Table8.A12" style:family="table-cell">
      <style:table-cell-properties style:vertical-align="middle" fo:padding-left="0.0833in" fo:padding-right="0.0833in" fo:padding-top="0.0556in" fo:padding-bottom="0.0556in" fo:border="0.25pt solid #cbd2d9"/>
    </style:style>
    <style:style style:name="Table8.B12" style:family="table-cell">
      <style:table-cell-properties style:vertical-align="middle" fo:padding-left="0.0833in" fo:padding-right="0.0833in" fo:padding-top="0.0556in" fo:padding-bottom="0.0556in" fo:border="0.25pt solid #cbd2d9"/>
    </style:style>
    <style:style style:name="Table8.C12" style:family="table-cell">
      <style:table-cell-properties style:vertical-align="middle" fo:padding-left="0.0833in" fo:padding-right="0.0833in" fo:padding-top="0.0556in" fo:padding-bottom="0.0556in" fo:border="0.25pt solid #cbd2d9"/>
    </style:style>
    <style:style style:name="Table8.D12" style:family="table-cell">
      <style:table-cell-properties style:vertical-align="middle" fo:padding-left="0.0833in" fo:padding-right="0.0833in" fo:padding-top="0.0556in" fo:padding-bottom="0.0556in" fo:border="0.25pt solid #cbd2d9"/>
    </style:style>
    <style:style style:name="Table8.A14" style:family="table-cell">
      <style:table-cell-properties style:vertical-align="middle" fo:padding-left="0.0833in" fo:padding-right="0.0833in" fo:padding-top="0.0556in" fo:padding-bottom="0.0556in" fo:border="0.25pt solid #cbd2d9"/>
    </style:style>
    <style:style style:name="Table8.B14" style:family="table-cell">
      <style:table-cell-properties style:vertical-align="middle" fo:padding-left="0.0833in" fo:padding-right="0.0833in" fo:padding-top="0.0556in" fo:padding-bottom="0.0556in" fo:border="0.25pt solid #cbd2d9"/>
    </style:style>
    <style:style style:name="Table8.C14" style:family="table-cell">
      <style:table-cell-properties style:vertical-align="middle" fo:padding-left="0.0833in" fo:padding-right="0.0833in" fo:padding-top="0.0556in" fo:padding-bottom="0.0556in" fo:border="0.25pt solid #cbd2d9"/>
    </style:style>
    <style:style style:name="Table8.D14" style:family="table-cell">
      <style:table-cell-properties style:vertical-align="middle" fo:padding-left="0.0833in" fo:padding-right="0.0833in" fo:padding-top="0.0556in" fo:padding-bottom="0.0556in" fo:border="0.25pt solid #cbd2d9"/>
    </style:style>
    <style:style style:name="Table9" style:family="table">
      <style:table-properties style:width="6.2681in" fo:margin-left="0.0014in" fo:margin-top="0in" fo:margin-bottom="0in" table:align="left" style:writing-mode="page"/>
    </style:style>
    <style:style style:name="Table9.A" style:family="table-column">
      <style:table-column-properties style:column-width="0.5014in"/>
    </style:style>
    <style:style style:name="Table9.B" style:family="table-column">
      <style:table-column-properties style:column-width="1.2535in"/>
    </style:style>
    <style:style style:name="Table9.C" style:family="table-column">
      <style:table-column-properties style:column-width="4.5132in"/>
    </style:style>
    <style:style style:name="Table9.1" style:family="table-row">
      <style:table-row-properties fo:keep-together="auto"/>
    </style:style>
    <style:style style:name="Table9.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9.A2" style:family="table-cell">
      <style:table-cell-properties style:vertical-align="middle" fo:padding-left="0.0833in" fo:padding-right="0.0833in" fo:padding-top="0.0556in" fo:padding-bottom="0.0556in" fo:border="0.25pt solid #cbd2d9"/>
    </style:style>
    <style:style style:name="Table9.B2" style:family="table-cell">
      <style:table-cell-properties style:vertical-align="middle" fo:padding-left="0.0833in" fo:padding-right="0.0833in" fo:padding-top="0.0556in" fo:padding-bottom="0.0556in" fo:border="0.25pt solid #cbd2d9"/>
    </style:style>
    <style:style style:name="Table9.C2" style:family="table-cell">
      <style:table-cell-properties style:vertical-align="middle" fo:padding-left="0.0833in" fo:padding-right="0.0833in" fo:padding-top="0.0556in" fo:padding-bottom="0.0556in" fo:border="0.25pt solid #cbd2d9"/>
    </style:style>
    <style:style style:name="Table9.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9.A4" style:family="table-cell">
      <style:table-cell-properties style:vertical-align="middle" fo:padding-left="0.0833in" fo:padding-right="0.0833in" fo:padding-top="0.0556in" fo:padding-bottom="0.0556in" fo:border="0.25pt solid #cbd2d9"/>
    </style:style>
    <style:style style:name="Table9.B4" style:family="table-cell">
      <style:table-cell-properties style:vertical-align="middle" fo:padding-left="0.0833in" fo:padding-right="0.0833in" fo:padding-top="0.0556in" fo:padding-bottom="0.0556in" fo:border="0.25pt solid #cbd2d9"/>
    </style:style>
    <style:style style:name="Table9.C4" style:family="table-cell">
      <style:table-cell-properties style:vertical-align="middle" fo:padding-left="0.0833in" fo:padding-right="0.0833in" fo:padding-top="0.0556in" fo:padding-bottom="0.0556in" fo:border="0.25pt solid #cbd2d9"/>
    </style:style>
    <style:style style:name="Table9.A6" style:family="table-cell">
      <style:table-cell-properties style:vertical-align="middle" fo:padding-left="0.0833in" fo:padding-right="0.0833in" fo:padding-top="0.0556in" fo:padding-bottom="0.0556in" fo:border="0.25pt solid #cbd2d9"/>
    </style:style>
    <style:style style:name="Table9.B6" style:family="table-cell">
      <style:table-cell-properties style:vertical-align="middle" fo:padding-left="0.0833in" fo:padding-right="0.0833in" fo:padding-top="0.0556in" fo:padding-bottom="0.0556in" fo:border="0.25pt solid #cbd2d9"/>
    </style:style>
    <style:style style:name="Table9.C6" style:family="table-cell">
      <style:table-cell-properties style:vertical-align="middle" fo:padding-left="0.0833in" fo:padding-right="0.0833in" fo:padding-top="0.0556in" fo:padding-bottom="0.0556in" fo:border="0.25pt solid #cbd2d9"/>
    </style:style>
    <style:style style:name="Table9.A8" style:family="table-cell">
      <style:table-cell-properties style:vertical-align="middle" fo:padding-left="0.0833in" fo:padding-right="0.0833in" fo:padding-top="0.0556in" fo:padding-bottom="0.0556in" fo:border="0.25pt solid #cbd2d9"/>
    </style:style>
    <style:style style:name="Table9.B8" style:family="table-cell">
      <style:table-cell-properties style:vertical-align="middle" fo:padding-left="0.0833in" fo:padding-right="0.0833in" fo:padding-top="0.0556in" fo:padding-bottom="0.0556in" fo:border="0.25pt solid #cbd2d9"/>
    </style:style>
    <style:style style:name="Table9.C8" style:family="table-cell">
      <style:table-cell-properties style:vertical-align="middle" fo:padding-left="0.0833in" fo:padding-right="0.0833in" fo:padding-top="0.0556in" fo:padding-bottom="0.0556in" fo:border="0.25pt solid #cbd2d9"/>
    </style:style>
    <style:style style:name="Table10" style:family="table">
      <style:table-properties style:width="6.2681in" fo:margin-left="0.0014in" fo:margin-top="0in" fo:margin-bottom="0in" table:align="left" style:writing-mode="page"/>
    </style:style>
    <style:style style:name="Table10.A" style:family="table-column">
      <style:table-column-properties style:column-width="0.9396in"/>
    </style:style>
    <style:style style:name="Table10.B" style:family="table-column">
      <style:table-column-properties style:column-width="3.4479in"/>
    </style:style>
    <style:style style:name="Table10.C" style:family="table-column">
      <style:table-column-properties style:column-width="1.8806in"/>
    </style:style>
    <style:style style:name="Table10.1" style:family="table-row">
      <style:table-row-properties fo:keep-together="auto"/>
    </style:style>
    <style:style style:name="Table10.A1" style:family="table-cell">
      <style:table-cell-properties style:vertical-align="middle" fo:background-color="#2e4c6d" fo:padding-left="0.0833in" fo:padding-right="0.0833in" fo:padding-top="0.0556in" fo:padding-bottom="0.0556in" fo:border="0.25pt solid #cbd2d9">
        <style:background-image/>
      </style:table-cell-properties>
    </style:style>
    <style:style style:name="Table10.A2" style:family="table-cell">
      <style:table-cell-properties style:vertical-align="middle" fo:padding-left="0.0833in" fo:padding-right="0.0833in" fo:padding-top="0.0556in" fo:padding-bottom="0.0556in" fo:border="0.25pt solid #cbd2d9"/>
    </style:style>
    <style:style style:name="Table10.B2" style:family="table-cell">
      <style:table-cell-properties style:vertical-align="middle" fo:padding-left="0.0833in" fo:padding-right="0.0833in" fo:padding-top="0.0556in" fo:padding-bottom="0.0556in" fo:border="0.25pt solid #cbd2d9"/>
    </style:style>
    <style:style style:name="Table10.C2" style:family="table-cell">
      <style:table-cell-properties style:vertical-align="middle" fo:padding-left="0.0833in" fo:padding-right="0.0833in" fo:padding-top="0.0556in" fo:padding-bottom="0.0556in" fo:border="0.25pt solid #cbd2d9"/>
    </style:style>
    <style:style style:name="Table10.A3" style:family="table-cell">
      <style:table-cell-properties style:vertical-align="middle" fo:background-color="#f3f5f7" fo:padding-left="0.0833in" fo:padding-right="0.0833in" fo:padding-top="0.0556in" fo:padding-bottom="0.0556in" fo:border="0.25pt solid #cbd2d9">
        <style:background-image/>
      </style:table-cell-properties>
    </style:style>
    <style:style style:name="Table10.A4" style:family="table-cell">
      <style:table-cell-properties style:vertical-align="middle" fo:padding-left="0.0833in" fo:padding-right="0.0833in" fo:padding-top="0.0556in" fo:padding-bottom="0.0556in" fo:border="0.25pt solid #cbd2d9"/>
    </style:style>
    <style:style style:name="Table10.B4" style:family="table-cell">
      <style:table-cell-properties style:vertical-align="middle" fo:padding-left="0.0833in" fo:padding-right="0.0833in" fo:padding-top="0.0556in" fo:padding-bottom="0.0556in" fo:border="0.25pt solid #cbd2d9"/>
    </style:style>
    <style:style style:name="Table10.C4" style:family="table-cell">
      <style:table-cell-properties style:vertical-align="middle" fo:padding-left="0.0833in" fo:padding-right="0.0833in" fo:padding-top="0.0556in" fo:padding-bottom="0.0556in" fo:border="0.25pt solid #cbd2d9"/>
    </style:style>
    <style:style style:name="Table10.A6" style:family="table-cell">
      <style:table-cell-properties style:vertical-align="middle" fo:padding-left="0.0833in" fo:padding-right="0.0833in" fo:padding-top="0.0556in" fo:padding-bottom="0.0556in" fo:border="0.25pt solid #cbd2d9"/>
    </style:style>
    <style:style style:name="Table10.B6" style:family="table-cell">
      <style:table-cell-properties style:vertical-align="middle" fo:padding-left="0.0833in" fo:padding-right="0.0833in" fo:padding-top="0.0556in" fo:padding-bottom="0.0556in" fo:border="0.25pt solid #cbd2d9"/>
    </style:style>
    <style:style style:name="Table10.C6" style:family="table-cell">
      <style:table-cell-properties style:vertical-align="middle" fo:padding-left="0.0833in" fo:padding-right="0.0833in" fo:padding-top="0.0556in" fo:padding-bottom="0.0556in" fo:border="0.25pt solid #cbd2d9"/>
    </style:style>
    <style:style style:name="P1" style:family="paragraph" style:parent-style-name="Heading_20_1">
      <style:paragraph-properties fo:margin-top="0in" fo:margin-bottom="0.1665in" style:contextual-spacing="false" fo:break-before="page"/>
    </style:style>
    <style:style style:name="P2" style:family="paragraph" style:parent-style-name="List_20_Paragraph" style:list-style-name="WWNum2">
      <style:paragraph-properties fo:margin-top="0in" fo:margin-bottom="0.0555in" style:contextual-spacing="false" fo:line-height="0.2016in"/>
    </style:style>
    <style:style style:name="P3" style:family="paragraph" style:parent-style-name="Standard">
      <style:paragraph-properties fo:margin-top="1.528in" fo:margin-bottom="0in" style:contextual-spacing="false" fo:text-align="center" style:justify-single-word="false"/>
    </style:style>
    <style:style style:name="P4" style:family="paragraph" style:parent-style-name="Standard">
      <style:paragraph-properties fo:margin-top="0.1665in" fo:margin-bottom="0.8335in" style:contextual-spacing="false" fo:text-align="center" style:justify-single-word="false"/>
    </style:style>
    <style:style style:name="P5" style:family="paragraph" style:parent-style-name="Standard">
      <style:paragraph-properties fo:margin-top="0in" fo:margin-bottom="0.0693in" style:contextual-spacing="false" fo:text-align="center" style:justify-single-word="false"/>
    </style:style>
    <style:style style:name="P6" style:family="paragraph" style:parent-style-name="Standard">
      <style:paragraph-properties fo:margin-top="0in" fo:margin-bottom="0.5555in" style:contextual-spacing="false" fo:text-align="center" style:justify-single-word="false"/>
    </style:style>
    <style:style style:name="P7" style:family="paragraph" style:parent-style-name="Standard">
      <style:paragraph-properties fo:margin-top="0.4165in" fo:margin-bottom="0in" style:contextual-spacing="false" fo:text-align="center" style:justify-single-word="false" fo:padding-left="0in" fo:padding-right="0in" fo:padding-top="0.111in" fo:padding-bottom="0in" fo:border-left="none" fo:border-right="none" fo:border-top="0.74pt solid #cbd2d9" fo:border-bottom="none"/>
    </style:style>
    <style:style style:name="P8" style:family="paragraph" style:parent-style-name="Standard">
      <style:paragraph-properties fo:margin-top="0in" fo:margin-bottom="0in" style:contextual-spacing="false" fo:text-align="center" style:justify-single-word="false"/>
    </style:style>
    <style:style style:name="P9" style:family="paragraph" style:parent-style-name="Standard">
      <style:paragraph-properties fo:margin-top="0.0555in" fo:margin-bottom="0.1665in" style:contextual-spacing="false"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in" fo:margin-top="0.0764in" fo:margin-bottom="0.0626in" style:contextual-spacing="false"/>
    </style:style>
    <style:style style:name="P12" style:family="paragraph" style:parent-style-name="Standard">
      <style:paragraph-properties fo:margin-left="0.25in" fo:margin-top="0in" fo:margin-bottom="0.028in" style:contextual-spacing="false"/>
    </style:style>
    <style:style style:name="P13" style:family="paragraph" style:parent-style-name="Standard">
      <style:paragraph-properties fo:margin-top="0in" fo:margin-bottom="0.111in" style:contextual-spacing="false" fo:line-height="0.2083in"/>
    </style:style>
    <style:style style:name="P14" style:family="paragraph" style:parent-style-name="Standard">
      <style:paragraph-properties fo:line-height="0.1874in"/>
    </style:style>
    <style:style style:name="P15" style:family="paragraph" style:parent-style-name="Standard">
      <style:paragraph-properties fo:text-align="end" style:justify-single-word="false"/>
    </style:style>
    <style:style style:name="T1" style:family="text">
      <style:text-properties fo:color="#2e4c6d" loext:opacity="100%" fo:font-size="28pt" fo:font-weight="bold" style:font-size-asian="28pt" style:font-weight-asian="bold" style:font-size-complex="28pt" style:font-weight-complex="bold"/>
    </style:style>
    <style:style style:name="T2" style:family="text">
      <style:text-properties fo:color="#2e4c6d" loext:opacity="100%" fo:font-size="10.5pt" fo:font-weight="bold" style:font-size-asian="10.5pt" style:font-weight-asian="bold" style:font-size-complex="10.5pt" style:font-weight-complex="bold"/>
    </style:style>
    <style:style style:name="T3" style:family="text">
      <style:text-properties fo:color="#2e4c6d" loext:opacity="100%"/>
    </style:style>
    <style:style style:name="T4" style:family="text">
      <style:text-properties fo:color="#5b6470" loext:opacity="100%" fo:font-size="13pt" style:font-size-asian="13pt" style:font-size-complex="13pt"/>
    </style:style>
    <style:style style:name="T5" style:family="text">
      <style:text-properties fo:color="#5b6470" loext:opacity="100%" fo:font-size="10pt" fo:font-style="italic" style:font-size-asian="10pt" style:font-style-asian="italic" style:font-size-complex="10pt" style:font-style-complex="italic"/>
    </style:style>
    <style:style style:name="T6" style:family="text">
      <style:text-properties fo:color="#5b6470" loext:opacity="100%" fo:font-size="9.5pt" fo:font-weight="bold" style:font-size-asian="9.5pt" style:font-weight-asian="bold" style:font-size-complex="9.5pt" style:font-weight-complex="bold"/>
    </style:style>
    <style:style style:name="T7" style:family="text">
      <style:text-properties fo:color="#5b6470" loext:opacity="100%" fo:font-size="9.5pt" style:font-size-asian="9.5pt" style:font-size-complex="9.5pt"/>
    </style:style>
    <style:style style:name="T8" style:family="text">
      <style:text-properties fo:color="#5b6470" loext:opacity="100%" fo:font-size="9pt" fo:font-style="italic" style:font-size-asian="9pt" style:font-style-asian="italic" style:font-size-complex="9pt" style:font-style-complex="italic"/>
    </style:style>
    <style:style style:name="T9" style:family="text">
      <style:text-properties fo:color="#5b6470" loext:opacity="100%" fo:font-size="8pt" style:font-size-asian="8pt" style:font-size-complex="8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style:font-size-asian="11pt" style:font-size-complex="11pt"/>
    </style:style>
    <style:style style:name="T12" style:family="text">
      <style:text-properties fo:color="#000000" loext:opacity="100%" fo:font-size="10pt" fo:font-weight="normal" style:font-size-asian="10pt" style:font-weight-asian="normal" style:font-size-complex="10pt" style:font-weight-complex="normal"/>
    </style:style>
    <style:style style:name="T13" style:family="text">
      <style:text-properties fo:color="#000000" loext:opacity="100%"/>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ffffff" loext:opacity="100%" fo:font-size="9.5pt" fo:font-weight="bold" style:font-size-asian="9.5pt" style:font-weight-asian="bold" style:font-size-complex="9.5pt" style:font-weight-complex="bold"/>
    </style:style>
    <style:style style:name="T17" style:family="text">
      <style:text-properties fo:font-size="9.5pt" style:font-size-asian="9.5pt" style:font-size-complex="9.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onitoring-Architektur</text:span></text:p>
      <text:p text:style-name="P4"><text:span text:style-name="T4">Konzeptpapier für eine ganzheitliche Observability- und Monitoring-Strategie über Infrastruktur, Applikationen, Security und Geschäftskennzahlen</text:span></text:p>
      <text:p text:style-name="P5"><text:span text:style-name="T10">Status: Entwurf / Diskussionsgrundlage — Version 0.1</text:span></text:p>
      <text:p text:style-name="P5"><text:span text:style-name="T11">Datum: 21. Juni 2026</text:span></text:p>
      <text:p text:style-name="P6"><text:span text:style-name="T5">Dieses Dokument ist eine Diskussionsgrundlage und wird im weiteren Dialog gemeinsam konkretisiert und fortgeschrieben.</text:span></text:p>
      <text:p text:style-name="P7"><text:span text:style-name="T6">Vertraulichkeitshinweis</text:span></text:p>
      <text:p text:style-name="P8"><text:span text:style-name="T7">Enthält Bezüge zu schutzbedürftigen Daten (Sozialdaten). Verteilung gemäß internem Klassifizierungsschema.</text:span></text:p>
      <text:p text:style-name="Standard"/>
      <text:h text:style-name="P1" text:outline-level="1">Inhaltsverzeichnis</text:h>
      <text:p text:style-name="P11"><text:a xlink:type="simple" xlink:href="#bm1" text:style-name="ListLabel_20_12" text:visited-style-name="ListLabel_20_12"><text:span text:style-name="T2">1. Einleitung und Zielsetzung</text:span></text:a><text:span text:style-name="T3"><text:tab/>4</text:span></text:p>
      <text:p text:style-name="P12"><text:a xlink:type="simple" xlink:href="#bm2" text:style-name="ListLabel_20_13" text:visited-style-name="ListLabel_20_13"><text:span text:style-name="T12">1.1 Geltungsbereich</text:span></text:a><text:span text:style-name="T13"><text:tab/>4</text:span></text:p>
      <text:p text:style-name="P12"><text:a xlink:type="simple" xlink:href="#bm3" text:style-name="ListLabel_20_13" text:visited-style-name="ListLabel_20_13"><text:span text:style-name="T12">1.2 Adressaten</text:span></text:a><text:span text:style-name="T13"><text:tab/>4</text:span></text:p>
      <text:p text:style-name="P12"><text:a xlink:type="simple" xlink:href="#bm4" text:style-name="ListLabel_20_13" text:visited-style-name="ListLabel_20_13"><text:span text:style-name="T12">1.3 Status des Dokuments</text:span></text:a><text:span text:style-name="T13"><text:tab/>4</text:span></text:p>
      <text:p text:style-name="P11"><text:a xlink:type="simple" xlink:href="#bm5" text:style-name="ListLabel_20_12" text:visited-style-name="ListLabel_20_12"><text:span text:style-name="T2">2. Ausgangslage / Ist-Zustand</text:span></text:a><text:span text:style-name="T3"><text:tab/>4</text:span></text:p>
      <text:p text:style-name="P12"><text:a xlink:type="simple" xlink:href="#bm6" text:style-name="ListLabel_20_13" text:visited-style-name="ListLabel_20_13"><text:span text:style-name="T12">2.1 Systemlandschaft im Überblick</text:span></text:a><text:span text:style-name="T13"><text:tab/>4</text:span></text:p>
      <text:p text:style-name="P12"><text:a xlink:type="simple" xlink:href="#bm7" text:style-name="ListLabel_20_13" text:visited-style-name="ListLabel_20_13"><text:span text:style-name="T12">2.2 Tool-Inventar</text:span></text:a><text:span text:style-name="T13"><text:tab/>5</text:span></text:p>
      <text:p text:style-name="P12"><text:a xlink:type="simple" xlink:href="#bm8" text:style-name="ListLabel_20_13" text:visited-style-name="ListLabel_20_13"><text:span text:style-name="T12">2.3 Bewertung der Ist-Situation</text:span></text:a><text:span text:style-name="T13"><text:tab/>6</text:span></text:p>
      <text:p text:style-name="P11"><text:a xlink:type="simple" xlink:href="#bm9" text:style-name="ListLabel_20_12" text:visited-style-name="ListLabel_20_12"><text:span text:style-name="T2">3. Architekturüberblick</text:span></text:a><text:span text:style-name="T3"><text:tab/>7</text:span></text:p>
      <text:p text:style-name="P12"><text:a xlink:type="simple" xlink:href="#bm10" text:style-name="ListLabel_20_13" text:visited-style-name="ListLabel_20_13"><text:span text:style-name="T12">3.1 Architekturprinzip</text:span></text:a><text:span text:style-name="T13"><text:tab/>7</text:span></text:p>
      <text:p text:style-name="P12"><text:a xlink:type="simple" xlink:href="#bm11" text:style-name="ListLabel_20_13" text:visited-style-name="ListLabel_20_13"><text:span text:style-name="T12">3.2 Hybrid-Cloud-Prinzip</text:span></text:a><text:span text:style-name="T13"><text:tab/>8</text:span></text:p>
      <text:p text:style-name="P11"><text:a xlink:type="simple" xlink:href="#bm12" text:style-name="ListLabel_20_12" text:visited-style-name="ListLabel_20_12"><text:span text:style-name="T2">4. Domänen im Detail</text:span></text:a><text:span text:style-name="T3"><text:tab/>8</text:span></text:p>
      <text:p text:style-name="P12"><text:a xlink:type="simple" xlink:href="#bm13" text:style-name="ListLabel_20_13" text:visited-style-name="ListLabel_20_13"><text:span text:style-name="T12">4.1 Infrastruktur-Monitoring</text:span></text:a><text:span text:style-name="T13"><text:tab/>8</text:span></text:p>
      <text:p text:style-name="P12"><text:a xlink:type="simple" xlink:href="#bm14" text:style-name="ListLabel_20_13" text:visited-style-name="ListLabel_20_13"><text:span text:style-name="T12">4.2 Application Performance Monitoring (APM)</text:span></text:a><text:span text:style-name="T13"><text:tab/>8</text:span></text:p>
      <text:p text:style-name="P12"><text:a xlink:type="simple" xlink:href="#bm15" text:style-name="ListLabel_20_13" text:visited-style-name="ListLabel_20_13"><text:span text:style-name="T12">4.3 Security / SIEM</text:span></text:a><text:span text:style-name="T13"><text:tab/>9</text:span></text:p>
      <text:p text:style-name="P12"><text:a xlink:type="simple" xlink:href="#bm16" text:style-name="ListLabel_20_13" text:visited-style-name="ListLabel_20_13"><text:span text:style-name="T12">4.4 Business- / KPI-Monitoring</text:span></text:a><text:span text:style-name="T13"><text:tab/>10</text:span></text:p>
      <text:p text:style-name="P11"><text:a xlink:type="simple" xlink:href="#bm17" text:style-name="ListLabel_20_12" text:visited-style-name="ListLabel_20_12"><text:span text:style-name="T2">5. Querschnittsthemen</text:span></text:a><text:span text:style-name="T3"><text:tab/>10</text:span></text:p>
      <text:p text:style-name="P12"><text:a xlink:type="simple" xlink:href="#bm18" text:style-name="ListLabel_20_13" text:visited-style-name="ListLabel_20_13"><text:span text:style-name="T12">5.1 Alerting und Eskalation</text:span></text:a><text:span text:style-name="T13"><text:tab/>10</text:span></text:p>
      <text:p text:style-name="P12"><text:a xlink:type="simple" xlink:href="#bm19" text:style-name="ListLabel_20_13" text:visited-style-name="ListLabel_20_13"><text:span text:style-name="T12">5.2 Datenhaltung, Aufbewahrung und Löschung</text:span></text:a><text:span text:style-name="T13"><text:tab/>10</text:span></text:p>
      <text:p text:style-name="P12"><text:a xlink:type="simple" xlink:href="#bm20" text:style-name="ListLabel_20_13" text:visited-style-name="ListLabel_20_13"><text:span text:style-name="T12">5.3 Zugriffskonzept und Rollen</text:span></text:a><text:span text:style-name="T13"><text:tab/>10</text:span></text:p>
      <text:p text:style-name="P12"><text:a xlink:type="simple" xlink:href="#bm21" text:style-name="ListLabel_20_13" text:visited-style-name="ListLabel_20_13"><text:soft-page-break/><text:span text:style-name="T12">5.4 Skalierbarkeit und Performance</text:span></text:a><text:span text:style-name="T13"><text:tab/>11</text:span></text:p>
      <text:p text:style-name="P12"><text:a xlink:type="simple" xlink:href="#bm22" text:style-name="ListLabel_20_13" text:visited-style-name="ListLabel_20_13"><text:span text:style-name="T12">5.5 Kosten</text:span></text:a><text:span text:style-name="T13"><text:tab/>11</text:span></text:p>
      <text:p text:style-name="P11"><text:a xlink:type="simple" xlink:href="#bm23" text:style-name="ListLabel_20_12" text:visited-style-name="ListLabel_20_12"><text:span text:style-name="T2">6. Tool-Bewertung und Entscheidungsgrundlage</text:span></text:a><text:span text:style-name="T3"><text:tab/>11</text:span></text:p>
      <text:p text:style-name="P12"><text:a xlink:type="simple" xlink:href="#bm24" text:style-name="ListLabel_20_13" text:visited-style-name="ListLabel_20_13"><text:span text:style-name="T12">6.1 Bewertungskriterien</text:span></text:a><text:span text:style-name="T13"><text:tab/>11</text:span></text:p>
      <text:p text:style-name="P12"><text:a xlink:type="simple" xlink:href="#bm25" text:style-name="ListLabel_20_13" text:visited-style-name="ListLabel_20_13"><text:span text:style-name="T12">6.2 Zentrale Entscheidungsfragen</text:span></text:a><text:span text:style-name="T13"><text:tab/>11</text:span></text:p>
      <text:p text:style-name="P12"><text:a xlink:type="simple" xlink:href="#bm26" text:style-name="ListLabel_20_13" text:visited-style-name="ListLabel_20_13"><text:span text:style-name="T12">6.3 Vorläufige Empfehlung (zur Diskussion)</text:span></text:a><text:span text:style-name="T13"><text:tab/>12</text:span></text:p>
      <text:p text:style-name="P12"><text:a xlink:type="simple" xlink:href="#bm27" text:style-name="ListLabel_20_13" text:visited-style-name="ListLabel_20_13"><text:span text:style-name="T12">6.4 Vertiefung: Konsolidiertes Logging bei 10 TB/Tag und 30 Tagen Aufbewahrung</text:span></text:a><text:span text:style-name="T13"><text:tab/>12</text:span></text:p>
      <text:p text:style-name="P12"><text:a xlink:type="simple" xlink:href="#bm28" text:style-name="ListLabel_20_13" text:visited-style-name="ListLabel_20_13"><text:span text:style-name="T12">6.5 Vertiefung: Packet Inspection / Netzwerk-Verkehrsanalyse</text:span></text:a><text:span text:style-name="T13"><text:tab/>14</text:span></text:p>
      <text:p text:style-name="P12"><text:a xlink:type="simple" xlink:href="#bm29" text:style-name="ListLabel_20_13" text:visited-style-name="ListLabel_20_13"><text:span text:style-name="T12">6.6 Vertiefung: ServiceNow ITOM/CSDM für Fehleranalyse und Kontextualisierung</text:span></text:a><text:span text:style-name="T13"><text:tab/>15</text:span></text:p>
      <text:p text:style-name="P12"><text:a xlink:type="simple" xlink:href="#bm30" text:style-name="ListLabel_20_13" text:visited-style-name="ListLabel_20_13"><text:span text:style-name="T12">6.7 Vertiefung: Zusammenspiel der vier Monitoring-Themenfelder</text:span></text:a><text:span text:style-name="T13"><text:tab/>17</text:span></text:p>
      <text:p text:style-name="P11"><text:a xlink:type="simple" xlink:href="#bm31" text:style-name="ListLabel_20_12" text:visited-style-name="ListLabel_20_12"><text:span text:style-name="T2">7. Anforderungskatalog</text:span></text:a><text:span text:style-name="T3"><text:tab/>18</text:span></text:p>
      <text:p text:style-name="P12"><text:a xlink:type="simple" xlink:href="#bm32" text:style-name="ListLabel_20_13" text:visited-style-name="ListLabel_20_13"><text:span text:style-name="T12">7.1 Funktionale Anforderungen</text:span></text:a><text:span text:style-name="T13"><text:tab/>18</text:span></text:p>
      <text:p text:style-name="P12"><text:a xlink:type="simple" xlink:href="#bm33" text:style-name="ListLabel_20_13" text:visited-style-name="ListLabel_20_13"><text:span text:style-name="T12">7.2 Nicht-funktionale Anforderungen</text:span></text:a><text:span text:style-name="T13"><text:tab/>19</text:span></text:p>
      <text:p text:style-name="P11"><text:a xlink:type="simple" xlink:href="#bm34" text:style-name="ListLabel_20_12" text:visited-style-name="ListLabel_20_12"><text:span text:style-name="T2">8. Roadmap / Migrationspfad</text:span></text:a><text:span text:style-name="T3"><text:tab/>19</text:span></text:p>
      <text:p text:style-name="P11"><text:a xlink:type="simple" xlink:href="#bm35" text:style-name="ListLabel_20_12" text:visited-style-name="ListLabel_20_12"><text:span text:style-name="T2">9. Offene Punkte, Risiken und nächste Schritte</text:span></text:a><text:span text:style-name="T3"><text:tab/>20</text:span></text:p>
      <text:p text:style-name="P12"><text:a xlink:type="simple" xlink:href="#bm36" text:style-name="ListLabel_20_13" text:visited-style-name="ListLabel_20_13"><text:span text:style-name="T12">9.1 Offene Punkte für den weiteren Dialog</text:span></text:a><text:span text:style-name="T13"><text:tab/>20</text:span></text:p>
      <text:p text:style-name="P12"><text:a xlink:type="simple" xlink:href="#bm37" text:style-name="ListLabel_20_13" text:visited-style-name="ListLabel_20_13"><text:span text:style-name="T12">9.2 Risiken</text:span></text:a><text:span text:style-name="T13"><text:tab/>21</text:span></text:p>
      <text:p text:style-name="P12"><text:a xlink:type="simple" xlink:href="#bm38" text:style-name="ListLabel_20_13" text:visited-style-name="ListLabel_20_13"><text:span text:style-name="T12">9.3 Vorgeschlagene nächste Schritte</text:span></text:a><text:span text:style-name="T13"><text:tab/>21</text:span></text:p>
      <text:p text:style-name="P11"><text:a xlink:type="simple" xlink:href="#bm39" text:style-name="ListLabel_20_12" text:visited-style-name="ListLabel_20_12"><text:span text:style-name="T2">10. Anhang</text:span></text:a><text:span text:style-name="T3"><text:tab/>21</text:span></text:p>
      <text:p text:style-name="P12"><text:a xlink:type="simple" xlink:href="#bm40" text:style-name="ListLabel_20_13" text:visited-style-name="ListLabel_20_13"><text:span text:style-name="T12">10.1 Glossar</text:span></text:a><text:span text:style-name="T13"><text:tab/>21</text:span></text:p>
      <text:p text:style-name="P12"><text:a xlink:type="simple" xlink:href="#bm41" text:style-name="ListLabel_20_13" text:visited-style-name="ListLabel_20_13"><text:span text:style-name="T12">10.2 Referenzen und Rechtsgrundlagen</text:span></text:a><text:span text:style-name="T13"><text:tab/>22</text:span></text:p>
      <text:p text:style-name="Standard"><text:soft-page-break/></text:p>
      <text:h text:style-name="P1" text:outline-level="1"><text:bookmark-start text:name="bm1"/>1. Einleitung und Zielsetzung<text:bookmark-end text:name="bm1"/></text:h>
      <text:p text:style-name="P13"><text:span text:style-name="T14">Dieses Dokument beschreibt eine ganzheitliche Monitoring-Architektur, die die vier zentralen Beobachtungsdomänen — Infrastruktur, Applikationsperformance (APM), Security und Geschäftsprozesse/KPIs — in einem gemeinsamen konzeptionellen Rahmen zusammenführt. Es dient gleichzeitig als:</text:span></text:p>
      <text:list text:style-name="WWNum2">
        <text:list-item text:start-value="1">
          <text:p text:style-name="P2">Architekturkonzept (Zielbild und Bausteine),</text:p>
        </text:list-item>
        <text:list-item>
          <text:p text:style-name="P2">technische Spezifikationsgrundlage (Komponenten, Schnittstellen, Datenflüsse),</text:p>
        </text:list-item>
        <text:list-item>
          <text:p text:style-name="P2">Entscheidungsvorlage (Bewertung des bestehenden Tool-Portfolios, Konsolidierungsoptionen),</text:p>
        </text:list-item>
        <text:list-item>
          <text:p text:style-name="P2">Anforderungskatalog (funktionale und nicht-funktionale Anforderungen je Domäne).</text:p>
        </text:list-item>
      </text:list>
      <text:h text:style-name="Heading_20_2" text:outline-level="2"><text:bookmark-start text:name="bm2"/>1.1 Geltungsbereich<text:bookmark-end text:name="bm2"/></text:h>
      <text:p text:style-name="P13"><text:span text:style-name="T14">Das Dokument bezieht sich auf die bestehende IT-Landschaft mit:</text:span></text:p>
      <text:list text:continue-numbering="true" text:style-name="WWNum2">
        <text:list-item>
          <text:p text:style-name="P2">rund 20.000 Servern (Linux und Windows),</text:p>
        </text:list-item>
        <text:list-item>
          <text:p text:style-name="P2">rund 100 Fachanwendungen,</text:p>
        </text:list-item>
        <text:list-item>
          <text:p text:style-name="P2">rund 200.000 Notebooks/Clients,</text:p>
        </text:list-item>
        <text:list-item>
          <text:p text:style-name="P2">einem umfangreichen Online-Angebot für Bürgerinnen und Bürger,</text:p>
        </text:list-item>
        <text:list-item>
          <text:p text:style-name="P2">einer hybriden Infrastruktur aus On-Premise-Rechenzentren sowie den Cloud-Plattformen AWS, Microsoft Azure und StackIT.</text:p>
        </text:list-item>
      </text:list>
      <text:p text:style-name="P13"><text:span text:style-name="T14">Besonderheit: Aufgrund der Verarbeitung von Sozialdaten unterliegt die Architektur den einschlägigen Vorgaben für den öffentlichen Dienst im Umgang mit besonders schutzbedürftigen personenbezogenen Daten (u. a. Sozialgeheimnis nach SGB I/SGB X, DSGVO einschließlich Art. 9, BSI IT-Grundschutz). Diese Anforderungen werden in Kapitel 5 und 7 vertieft.</text:span></text:p>
      <text:h text:style-name="Heading_20_2" text:outline-level="2"><text:bookmark-start text:name="bm3"/>1.2 Adressaten<text:bookmark-end text:name="bm3"/></text:h>
      <text:p text:style-name="P13"><text:span text:style-name="T14">IT-Betrieb, Security-/Datenschutzorganisation, Anwendungsverantwortliche sowie IT-Leitung und Entscheidungsgremien.</text:span></text:p>
      <text:h text:style-name="Heading_20_2" text:outline-level="2"><text:bookmark-start text:name="bm4"/>1.3 Status des Dokuments<text:bookmark-end text:name="bm4"/></text:h>
      <text:p text:style-name="P13"><text:span text:style-name="T14">Diskussionsgrundlage (Version 0.1). Inhalte werden iterativ im Dialog konkretisiert; offene Punkte sind durchgängig gekennzeichnet und in Kapitel 9 zusammengefasst.</text:span></text:p>
      <text:h text:style-name="Heading_20_1" text:outline-level="1"><text:bookmark-start text:name="bm5"/>2. Ausgangslage / Ist-Zustand<text:bookmark-end text:name="bm5"/></text:h>
      <text:h text:style-name="Heading_20_2" text:outline-level="2"><text:bookmark-start text:name="bm6"/>2.1 Systemlandschaft im Überblick<text:bookmark-end text:name="bm6"/></text:h>
      <text:list text:continue-numbering="true" text:style-name="WWNum2">
        <text:list-item>
          <text:p text:style-name="P2">Windows-zentrierte Kernsysteme: AD, Exchange, MSSQL, SharePoint, überwacht über Microsoft SCOM.</text:p>
        </text:list-item>
        <text:list-item>
          <text:p text:style-name="P2"><text:soft-page-break/>Linux- und Cloud-native Landschaft: Metrik-Monitoring über VictoriaMetrics mit Telegraf und vmagent als Erfassungsagenten, Visualisierung über Grafana, Log-Aggregation über Loki, OpenSearch und Elasticsearch, verteiltes Tracing über Tempo.</text:p>
        </text:list-item>
        <text:list-item>
          <text:p text:style-name="P2">Netzwerk und Rechenzentrum: NetworkNodeManager (NNMi) für klassisches Netzwerk-Monitoring, Cisco ACI als Fabric, VMware/vSphere für Virtualisierung, Kubernetes mit SUSE Rancher für Container-Orchestrierung, VPN-Infrastruktur für rund 100.000 mobil angebundene Notebooks.</text:p>
        </text:list-item>
        <text:list-item>
          <text:p text:style-name="P2">Digitale Außensicht: CatchPoint für synthetisches Monitoring und Real User Monitoring des Online-Angebots, Automai für robotic-/GUI-basiertes synthetisches Monitoring interner Fachanwendungen (insb. Citrix/Fat-Client/Terminal-Server ohne API-Zugriff).</text:p>
        </text:list-item>
        <text:list-item>
          <text:p text:style-name="P2">Prozessintegration: ServiceNow als ITSM-Plattform (Incident-/Change-/CMDB).</text:p>
        </text:list-item>
        <text:list-item>
          <text:p text:style-name="P2">Hybrid-Cloud: AWS, Microsoft Azure und StackIT als europäische/souveräne Cloud-Plattform.</text:p>
        </text:list-item>
      </text:list>
      <text:h text:style-name="Heading_20_2" text:outline-level="2"><text:bookmark-start text:name="bm7"/>2.2 Tool-Inventar<text:bookmark-end text:name="bm7"/></text:h>
      <table:table table:name="Table1" table:style-name="Table1">
        <table:table-column table:style-name="Table1.A"/>
        <table:table-column table:style-name="Table1.B"/>
        <table:table-column table:style-name="Table1.C"/>
        <table:table-column table:style-name="Table1.D"/>
        <table:table-header-rows>
          <text:soft-page-break/>
          <table:table-row table:style-name="Table1.1">
            <table:table-cell table:style-name="Table1.A1" office:value-type="string">
              <text:p text:style-name="Standard"><text:span text:style-name="T16">Domäne</text:span></text:p>
            </table:table-cell>
            <table:table-cell table:style-name="Table1.A1" office:value-type="string">
              <text:p text:style-name="Standard"><text:span text:style-name="T16">Tool / Komponente</text:span></text:p>
            </table:table-cell>
            <table:table-cell table:style-name="Table1.A1" office:value-type="string">
              <text:p text:style-name="Standard"><text:span text:style-name="T16">Funktion</text:span></text:p>
            </table:table-cell>
            <table:table-cell table:style-name="Table1.A1" office:value-type="string">
              <text:p text:style-name="Standard"><text:span text:style-name="T16">Plattform / Reichweite</text:span></text:p>
            </table:table-cell>
          </table:table-row>
        </table:table-header-rows>
        <table:table-row table:style-name="Table1.1">
          <table:table-cell table:style-name="Table1.A2" office:value-type="string">
            <text:p text:style-name="P14"><text:span text:style-name="T17">Infrastruktur (Windows)</text:span></text:p>
          </table:table-cell>
          <table:table-cell table:style-name="Table1.B2" office:value-type="string">
            <text:p text:style-name="P14"><text:span text:style-name="T17">SCOM</text:span></text:p>
          </table:table-cell>
          <table:table-cell table:style-name="Table1.C2" office:value-type="string">
            <text:p text:style-name="P14"><text:span text:style-name="T17">Monitoring von AD, Exchange, MSSQL, SharePoint</text:span></text:p>
          </table:table-cell>
          <table:table-cell table:style-name="Table1.D2" office:value-type="string">
            <text:p text:style-name="P14"><text:span text:style-name="T17">On-Premise (Windows-Server)</text:span></text:p>
          </table:table-cell>
        </table:table-row>
        <table:table-row table:style-name="Table1.1">
          <table:table-cell table:style-name="Table1.A3" office:value-type="string">
            <text:p text:style-name="P14"><text:span text:style-name="T17">Infrastruktur (Linux)</text:span></text:p>
          </table:table-cell>
          <table:table-cell table:style-name="Table1.A3" office:value-type="string">
            <text:p text:style-name="P14"><text:span text:style-name="T17">Telegraf, vmagent → VictoriaMetrics</text:span></text:p>
          </table:table-cell>
          <table:table-cell table:style-name="Table1.A3" office:value-type="string">
            <text:p text:style-name="P14"><text:span text:style-name="T17">Metrik-Erfassung und -Speicherung für Linux-Systeme</text:span></text:p>
          </table:table-cell>
          <table:table-cell table:style-name="Table1.A3" office:value-type="string">
            <text:p text:style-name="P14"><text:span text:style-name="T17">On-Premise (Linux-Server)</text:span></text:p>
          </table:table-cell>
        </table:table-row>
        <table:table-row table:style-name="Table1.1">
          <table:table-cell table:style-name="Table1.A4" office:value-type="string">
            <text:p text:style-name="P14"><text:span text:style-name="T17">Übergreifend</text:span></text:p>
          </table:table-cell>
          <table:table-cell table:style-name="Table1.B4" office:value-type="string">
            <text:p text:style-name="P14"><text:span text:style-name="T17">Grafana</text:span></text:p>
          </table:table-cell>
          <table:table-cell table:style-name="Table1.C4" office:value-type="string">
            <text:p text:style-name="P14"><text:span text:style-name="T17">Visualisierung, Dashboards, Alerting</text:span></text:p>
          </table:table-cell>
          <table:table-cell table:style-name="Table1.D4" office:value-type="string">
            <text:p text:style-name="P14"><text:span text:style-name="T17">Übergreifend (zentrales Cockpit)</text:span></text:p>
          </table:table-cell>
        </table:table-row>
        <table:table-row table:style-name="Table1.1">
          <table:table-cell table:style-name="Table1.A3" office:value-type="string">
            <text:p text:style-name="P14"><text:span text:style-name="T17">Infrastruktur / Logs</text:span></text:p>
          </table:table-cell>
          <table:table-cell table:style-name="Table1.A3" office:value-type="string">
            <text:p text:style-name="P14"><text:span text:style-name="T17">Loki</text:span></text:p>
          </table:table-cell>
          <table:table-cell table:style-name="Table1.A3" office:value-type="string">
            <text:p text:style-name="P14"><text:span text:style-name="T17">Log-Aggregation, vorrangig Infrastruktur-/Kubernetes-nah</text:span></text:p>
          </table:table-cell>
          <table:table-cell table:style-name="Table1.A3" office:value-type="string">
            <text:p text:style-name="P14"><text:span text:style-name="T17">On-Premise / Kubernetes</text:span></text:p>
          </table:table-cell>
        </table:table-row>
        <table:table-row table:style-name="Table1.1">
          <table:table-cell table:style-name="Table1.A6" office:value-type="string">
            <text:p text:style-name="P14"><text:span text:style-name="T17">Infrastruktur / Logs</text:span></text:p>
          </table:table-cell>
          <table:table-cell table:style-name="Table1.B6" office:value-type="string">
            <text:p text:style-name="P14"><text:span text:style-name="T17">OpenSearch</text:span></text:p>
          </table:table-cell>
          <table:table-cell table:style-name="Table1.C6" office:value-type="string">
            <text:p text:style-name="P14"><text:span text:style-name="T17">Log- und Such-Plattform</text:span></text:p>
          </table:table-cell>
          <table:table-cell table:style-name="Table1.D6" office:value-type="string">
            <text:p text:style-name="P14"><text:span text:style-name="T17">On-Premise</text:span></text:p>
          </table:table-cell>
        </table:table-row>
        <table:table-row table:style-name="Table1.1">
          <table:table-cell table:style-name="Table1.A3" office:value-type="string">
            <text:p text:style-name="P14"><text:span text:style-name="T17">Infrastruktur / Logs</text:span></text:p>
          </table:table-cell>
          <table:table-cell table:style-name="Table1.A3" office:value-type="string">
            <text:p text:style-name="P14"><text:span text:style-name="T17">Elasticsearch</text:span></text:p>
          </table:table-cell>
          <table:table-cell table:style-name="Table1.A3" office:value-type="string">
            <text:p text:style-name="P14"><text:span text:style-name="T17">Log- und Such-Plattform</text:span></text:p>
          </table:table-cell>
          <table:table-cell table:style-name="Table1.A3" office:value-type="string">
            <text:p text:style-name="P14"><text:span text:style-name="T17">On-Premise</text:span></text:p>
          </table:table-cell>
        </table:table-row>
        <table:table-row table:style-name="Table1.1">
          <table:table-cell table:style-name="Table1.A8" office:value-type="string">
            <text:p text:style-name="P14"><text:span text:style-name="T17">APM</text:span></text:p>
          </table:table-cell>
          <table:table-cell table:style-name="Table1.B8" office:value-type="string">
            <text:p text:style-name="P14"><text:span text:style-name="T17">Tempo</text:span></text:p>
          </table:table-cell>
          <table:table-cell table:style-name="Table1.C8" office:value-type="string">
            <text:p text:style-name="P14"><text:span text:style-name="T17">Verteiltes Tracing</text:span></text:p>
          </table:table-cell>
          <table:table-cell table:style-name="Table1.D8" office:value-type="string">
            <text:p text:style-name="P14"><text:span text:style-name="T17">On-Premise / Kubernetes</text:span></text:p>
          </table:table-cell>
        </table:table-row>
        <table:table-row table:style-name="Table1.1">
          <table:table-cell table:style-name="Table1.A3" office:value-type="string">
            <text:p text:style-name="P14"><text:span text:style-name="T17">Security</text:span></text:p>
          </table:table-cell>
          <table:table-cell table:style-name="Table1.A3" office:value-type="string">
            <text:p text:style-name="P14"><text:span text:style-name="T17">SIEM</text:span></text:p>
          </table:table-cell>
          <table:table-cell table:style-name="Table1.A3" office:value-type="string">
            <text:p text:style-name="P14"><text:span text:style-name="T17">Korrelation und Auswertung sicherheitsrelevanter Events (Produktbezeichnung im Dialog zu ergänzen)</text:span></text:p>
          </table:table-cell>
          <table:table-cell table:style-name="Table1.A3" office:value-type="string">
            <text:p text:style-name="P14"><text:span text:style-name="T17">Übergreifend</text:span></text:p>
          </table:table-cell>
        </table:table-row>
        <table:table-row table:style-name="Table1.1">
          <table:table-cell table:style-name="Table1.A10" office:value-type="string">
            <text:p text:style-name="P14"><text:span text:style-name="T17">Security</text:span></text:p>
          </table:table-cell>
          <table:table-cell table:style-name="Table1.B10" office:value-type="string">
            <text:p text:style-name="P14"><text:span text:style-name="T17">CERT</text:span></text:p>
          </table:table-cell>
          <table:table-cell table:style-name="Table1.C10" office:value-type="string">
            <text:p text:style-name="P14"><text:span text:style-name="T17">Security-Incident-Response, Behandlung sicherheitsrelevanter Vorfälle</text:span></text:p>
          </table:table-cell>
          <table:table-cell table:style-name="Table1.D10" office:value-type="string">
            <text:p text:style-name="P14"><text:span text:style-name="T17">Übergreifend</text:span></text:p>
          </table:table-cell>
        </table:table-row>
        <table:table-row table:style-name="Table1.1">
          <table:table-cell table:style-name="Table1.A3" office:value-type="string">
            <text:p text:style-name="P14"><text:span text:style-name="T17">Netzwerk</text:span></text:p>
          </table:table-cell>
          <table:table-cell table:style-name="Table1.A3" office:value-type="string">
            <text:p text:style-name="P14"><text:span text:style-name="T17">NetworkNodeManager (NNMi)</text:span></text:p>
          </table:table-cell>
          <table:table-cell table:style-name="Table1.A3" office:value-type="string">
            <text:p text:style-name="P14"><text:span text:style-name="T17">Netzwerk-Monitoring, Topologie</text:span></text:p>
          </table:table-cell>
          <table:table-cell table:style-name="Table1.A3" office:value-type="string">
            <text:p text:style-name="P14"><text:span text:style-name="T17">On-Premise</text:span></text:p>
          </table:table-cell>
        </table:table-row>
        <table:table-row table:style-name="Table1.1">
          <table:table-cell table:style-name="Table1.A12" office:value-type="string">
            <text:p text:style-name="P14"><text:span text:style-name="T17">Netzwerk / Rechenzentrum</text:span></text:p>
          </table:table-cell>
          <table:table-cell table:style-name="Table1.B12" office:value-type="string">
            <text:p text:style-name="P14"><text:span text:style-name="T17">Cisco ACI</text:span></text:p>
          </table:table-cell>
          <table:table-cell table:style-name="Table1.C12" office:value-type="string">
            <text:p text:style-name="P14"><text:span text:style-name="T17">Netzwerk-Fabric, Assurance</text:span></text:p>
          </table:table-cell>
          <table:table-cell table:style-name="Table1.D12" office:value-type="string">
            <text:p text:style-name="P14"><text:span text:style-name="T17">On-Premise-Rechenzentrum</text:span></text:p>
          </table:table-cell>
        </table:table-row>
        <table:table-row table:style-name="Table1.1">
          <table:table-cell table:style-name="Table1.A3" office:value-type="string">
            <text:p text:style-name="P14"><text:span text:style-name="T17">Virtualisierung</text:span></text:p>
          </table:table-cell>
          <table:table-cell table:style-name="Table1.A3" office:value-type="string">
            <text:p text:style-name="P14"><text:span text:style-name="T17">VMware vSphere</text:span></text:p>
          </table:table-cell>
          <table:table-cell table:style-name="Table1.A3" office:value-type="string">
            <text:p text:style-name="P14"><text:span text:style-name="T17">Virtualisierungsmanagement und -monitoring</text:span></text:p>
          </table:table-cell>
          <table:table-cell table:style-name="Table1.A3" office:value-type="string">
            <text:p text:style-name="P14"><text:span text:style-name="T17">On-Premise</text:span></text:p>
          </table:table-cell>
        </table:table-row>
        <table:table-row table:style-name="Table1.1">
          <table:table-cell table:style-name="Table1.A14" office:value-type="string">
            <text:p text:style-name="P14"><text:span text:style-name="T17">Container</text:span></text:p>
          </table:table-cell>
          <table:table-cell table:style-name="Table1.B14" office:value-type="string">
            <text:p text:style-name="P14"><text:span text:style-name="T17">Kubernetes mit SUSE Rancher</text:span></text:p>
          </table:table-cell>
          <table:table-cell table:style-name="Table1.C14" office:value-type="string">
            <text:p text:style-name="P14"><text:span text:style-name="T17">Container-Orchestrierung und -Management</text:span></text:p>
          </table:table-cell>
          <table:table-cell table:style-name="Table1.D14" office:value-type="string">
            <text:p text:style-name="P14"><text:span text:style-name="T17">On-Premise / Hybrid</text:span></text:p>
          </table:table-cell>
        </table:table-row>
        <table:table-row table:style-name="Table1.1">
          <table:table-cell table:style-name="Table1.A3" office:value-type="string">
            <text:p text:style-name="P14"><text:span text:style-name="T17">Endgeräte / Remote-Zugriff</text:span></text:p>
          </table:table-cell>
          <table:table-cell table:style-name="Table1.A3" office:value-type="string">
            <text:p text:style-name="P14"><text:span text:style-name="T17">VPN-Infrastruktur</text:span></text:p>
          </table:table-cell>
          <table:table-cell table:style-name="Table1.A3" office:value-type="string">
            <text:p text:style-name="P14"><text:span text:style-name="T17">Anbindung von rund 100.000 Notebooks</text:span></text:p>
          </table:table-cell>
          <table:table-cell table:style-name="Table1.A3" office:value-type="string">
            <text:p text:style-name="P14"><text:span text:style-name="T17">On-Premise</text:span></text:p>
          </table:table-cell>
        </table:table-row>
        <table:table-row table:style-name="Table1.1">
          <table:table-cell table:style-name="Table1.A16" office:value-type="string">
            <text:p text:style-name="P14"><text:span text:style-name="T17">Business / KPI</text:span></text:p>
          </table:table-cell>
          <table:table-cell table:style-name="Table1.B16" office:value-type="string">
            <text:p text:style-name="P14"><text:span text:style-name="T17">CatchPoint</text:span></text:p>
          </table:table-cell>
          <table:table-cell table:style-name="Table1.C16" office:value-type="string">
            <text:p text:style-name="P14"><text:span text:style-name="T17">Synthetisches Monitoring, Real User Monitoring des Online-Angebots</text:span></text:p>
          </table:table-cell>
          <table:table-cell table:style-name="Table1.D16" office:value-type="string">
            <text:p text:style-name="P14"><text:span text:style-name="T17">Extern / Cloud (Außensicht)</text:span></text:p>
          </table:table-cell>
        </table:table-row>
        <table:table-row table:style-name="Table1.1">
          <table:table-cell table:style-name="Table1.A3" office:value-type="string">
            <text:p text:style-name="P14"><text:span text:style-name="T17">ITSM / Prozess</text:span></text:p>
          </table:table-cell>
          <table:table-cell table:style-name="Table1.A3" office:value-type="string">
            <text:p text:style-name="P14"><text:span text:style-name="T17">ServiceNow</text:span></text:p>
          </table:table-cell>
          <table:table-cell table:style-name="Table1.A3" office:value-type="string">
            <text:p text:style-name="P14"><text:span text:style-name="T17">Incident-/Change-Management, CMDB (ITOM-Lizenzstufe und CSDM-Reifegrad zu klären, siehe 6.6)</text:span></text:p>
          </table:table-cell>
          <table:table-cell table:style-name="Table1.A3" office:value-type="string">
            <text:p text:style-name="P14"><text:span text:style-name="T17">Übergreifend</text:span></text:p>
          </table:table-cell>
        </table:table-row>
        <table:table-row table:style-name="Table1.1">
          <table:table-cell table:style-name="Table1.A18" office:value-type="string">
            <text:p text:style-name="P14"><text:span text:style-name="T17">APM</text:span></text:p>
          </table:table-cell>
          <table:table-cell table:style-name="Table1.B18" office:value-type="string">
            <text:p text:style-name="P14"><text:span text:style-name="T17">Automai</text:span></text:p>
          </table:table-cell>
          <table:table-cell table:style-name="Table1.C18" office:value-type="string">
            <text:p text:style-name="P14"><text:span text:style-name="T17">Synthetisches Monitoring (robotic, GUI-/bildschirmbasiert) für interne Fachanwendungen ohne API-Zugriff, insb. Citrix/Fat-Client/Terminal-Server</text:span></text:p>
          </table:table-cell>
          <table:table-cell table:style-name="Table1.D18" office:value-type="string">
            <text:p text:style-name="P14"><text:span text:style-name="T17">On-Premise</text:span></text:p>
          </table:table-cell>
        </table:table-row>
        <table:table-row table:style-name="Table1.1">
          <table:table-cell table:style-name="Table1.A3" office:value-type="string">
            <text:p text:style-name="P14"><text:span text:style-name="T17">Cloud</text:span></text:p>
          </table:table-cell>
          <table:table-cell table:style-name="Table1.A3" office:value-type="string">
            <text:p text:style-name="P14"><text:span text:style-name="T17">AWS, Azure, StackIT</text:span></text:p>
          </table:table-cell>
          <table:table-cell table:style-name="Table1.A3" office:value-type="string">
            <text:p text:style-name="P14"><text:span text:style-name="T17">Hybride Cloud-Plattformen (Monitoring-Integration noch offen)</text:span></text:p>
          </table:table-cell>
          <table:table-cell table:style-name="Table1.A3" office:value-type="string">
            <text:p text:style-name="P14"><text:span text:style-name="T17">Cloud</text:span></text:p>
          </table:table-cell>
        </table:table-row>
        <table:table-row table:style-name="Table1.1">
          <table:table-cell table:style-name="Table1.A20" office:value-type="string">
            <text:p text:style-name="P14"><text:span text:style-name="T17">Security</text:span></text:p>
          </table:table-cell>
          <table:table-cell table:style-name="Table1.B20" office:value-type="string">
            <text:p text:style-name="P14"><text:span text:style-name="T17">Netzwerk-Verkehrsanalyse / Packet Inspection</text:span></text:p>
          </table:table-cell>
          <table:table-cell table:style-name="Table1.C20" office:value-type="string">
            <text:p text:style-name="P14"><text:span text:style-name="T17">Noch nicht im Einsatz — in Evaluierung (siehe Kapitel 6.5)</text:span></text:p>
          </table:table-cell>
          <table:table-cell table:style-name="Table1.D20" office:value-type="string">
            <text:p text:style-name="P14"><text:span text:style-name="T17">—</text:span></text:p>
          </table:table-cell>
        </table:table-row>
        <table:table-row table:style-name="Table1.1">
          <table:table-cell table:style-name="Table1.A3" office:value-type="string">
            <text:p text:style-name="P14"><text:span text:style-name="T17">Infrastruktur</text:span></text:p>
          </table:table-cell>
          <table:table-cell table:style-name="Table1.A3" office:value-type="string">
            <text:p text:style-name="P14"><text:span text:style-name="T17">Endpoint-Monitoring / DEX</text:span></text:p>
          </table:table-cell>
          <table:table-cell table:style-name="Table1.A3" office:value-type="string">
            <text:p text:style-name="P14"><text:span text:style-name="T17">Noch nicht im Einsatz — Beschaffung geplant (siehe Kapitel 6.7)</text:span></text:p>
          </table:table-cell>
          <table:table-cell table:style-name="Table1.A3" office:value-type="string">
            <text:p text:style-name="P14"><text:span text:style-name="T17">—</text:span></text:p>
          </table:table-cell>
        </table:table-row>
      </table:table>
      <text:p text:style-name="P9"><text:span text:style-name="T8">Tabelle 1: Tool-Inventar nach Domäne (Stand: Angaben aus dem Dialog, zu verifizieren)</text:span></text:p>
      <text:h text:style-name="Heading_20_2" text:outline-level="2"><text:bookmark-start text:name="bm8"/>2.3 Bewertung der Ist-Situation<text:bookmark-end text:name="bm8"/></text:h>
      <text:h text:style-name="Heading_20_3" text:outline-level="3">Stärken</text:h>
      <text:list text:continue-numbering="true" text:style-name="WWNum2">
        <text:list-item>
          <text:p text:style-name="P2">Mit VictoriaMetrics, Telegraf/vmagent, Grafana, Loki und Tempo ist im Linux-/Cloud-native-Bereich bereits ein kohärenter, leistungsfähiger Open-Source-Observability-Stack etabliert.</text:p>
        </text:list-item>
        <text:list-item>
          <text:p text:style-name="P2">Mit CatchPoint existiert bereits eine Außensicht auf das Online-Angebot, was die Business-/KPI-Domäne stärkt.</text:p>
        </text:list-item>
        <text:list-item>
          <text:p text:style-name="P2">ServiceNow als gemeinsame ITSM-Klammer ermöglicht prinzipiell eine einheitliche Eskalations- und CMDB-Anbindung über alle Domänen hinweg.</text:p>
        </text:list-item>
        <text:list-item>
          <text:p text:style-name="P2">Für die Microsoft-Kernsysteme ist mit SCOM ein etabliertes, herstellerintegriertes Monitoring vorhanden.</text:p>
        </text:list-item>
        <text:list-item>
          <text:p text:style-name="P2">Mit einem bestehenden SIEM-System und einem eigenen CERT ist die Security-Domäne bereits organisatorisch und technisch verankert, inklusive dedizierter Incident-Response-Kompetenz.</text:p>
        </text:list-item>
      </text:list>
      <text:h text:style-name="Heading_20_3" text:outline-level="3">Beobachtungen und Lücken (zu vertiefen im Dialog)</text:h>
      <text:list text:continue-numbering="true" text:style-name="WWNum2">
        <text:list-item>
          <text:p text:style-name="P2">Trennung zweier Welten: Windows-zentrierte Systeme werden über SCOM, die Linux-/Cloud-native-Welt über den VictoriaMetrics-/Grafana-Stack beobachtet. Ohne explizite Integration entsteht ein blinder Fleck für Ende-zu-Ende-Sichten über Systemgrenzen hinweg.</text:p>
        </text:list-item>
        <text:list-item>
          <text:p text:style-name="P2">Parallelbetrieb von drei Log-Systemen (Loki, OpenSearch, Elasticsearch): Konsolidierungspotenzial, Kostenstruktur und Zuständigkeiten sollten geklärt werden (siehe Kapitel 6).</text:p>
        </text:list-item>
        <text:list-item>
          <text:p text:style-name="P2">SIEM-Integrationstiefe unklar: Es ist noch zu klären, welche Log- und Event-Quellen (z. B. SCOM, NNMi, Cisco ACI, OpenSearch/Elasticsearch, Cloud-Plattformen) bereits an das SIEM angebunden sind und wo noch Abdeckungslücken bestehen.</text:p>
        </text:list-item>
        <text:list-item>
          <text:p text:style-name="P2">Cloud-Integration unklar: Für AWS, Azure und StackIT ist noch nicht spezifiziert, wie Telemetriedaten in die zentrale Beobachtungsplattform überführt werden.</text:p>
        </text:list-item>
        <text:list-item>
          <text:p text:style-name="P2">Skalierungsfragen bei 20.000 Servern und 100 Fachanwendungen: Die Kapazitätsplanung für VictoriaMetrics, Loki und OpenSearch (Cardinality, Retention, Storage) ist zu verifizieren.</text:p>
        </text:list-item>
      </text:list>
      <text:h text:style-name="Heading_20_1" text:outline-level="1"><text:bookmark-start text:name="bm9"/>3. Architekturüberblick<text:bookmark-end text:name="bm9"/></text:h>
      <text:p text:style-name="P13"><text:span text:style-name="T14">Das vorgeschlagene Referenzmodell gliedert die Beobachtungsarchitektur in vier Schichten, die die bestehenden Werkzeuge einordnen und zugleich die offenen Integrationspunkte sichtbar machen.</text:span></text:p>
      <text:p text:style-name="P10"><draw:frame draw:style-name="fr1" draw:name="Image1" text:anchor-type="as-char" svg:width="6.25in" svg:height="4.8854in" draw:z-index="0"><draw:image xlink:href="Pictures/10000001000006D1000005540E207524.png" xlink:type="simple" xlink:show="embed" xlink:actuate="onLoad" draw:mime-type="image/png"/></draw:frame></text:p>
      <text:p text:style-name="P9"><text:span text:style-name="T8">Abbildung 1: Referenzarchitektur in vier Schichten (gestrichelt = offener Integrationspunkt)</text:span></text:p>
      <text:h text:style-name="Heading_20_2" text:outline-level="2"><text:bookmark-start text:name="bm10"/>3.1 Architekturprinzip<text:bookmark-end text:name="bm10"/></text:h>
      <text:p text:style-name="P13"><text:span text:style-name="T14">Leitprinzip ist eine föderierte Erfassung mit zentraler Korrelation: Jede Domäne erfasst Telemetriedaten mit dem jeweils geeigneten, bereits etablierten Werkzeug. Die Zusammenführung erfolgt über Grafana als gemeinsames Cockpit („Single Pane of Glass“), ergänzt um die SCOM-Konsole für tiefes Windows-spezifisches Troubleshooting und ServiceNow für den Geschäfts- und CMDB-Kontext.</text:span></text:p>
      <text:p text:style-name="P13"><text:soft-page-break/><text:span text:style-name="T14">Zusätzlich kann ServiceNow ITOM Event Management als weitere Korrelationsebene zwischen den Erfassungswerkzeugen und dem Incident-Prozess wirken: Es nimmt Events aus mehreren Quellen auf, dedupliziert sie und reichert sie über die CSDM-modellierte CMDB mit Geschäftskontext an, bevor ein Incident entsteht (vertiefend in Kapitel 6.6).</text:span></text:p>
      <text:h text:style-name="Heading_20_2" text:outline-level="2"><text:bookmark-start text:name="bm11"/>3.2 Hybrid-Cloud-Prinzip<text:bookmark-end text:name="bm11"/></text:h>
      <text:p text:style-name="P13"><text:span text:style-name="T14">Für AWS, Azure und StackIT ist eine einheitliche Anbindung an dieselbe zentrale Pipeline vorzusehen, damit On-Premise- und Cloud-Ressourcen in denselben Dashboards korrelierbar bleiben. Die konkrete Umsetzung (native Cloud-Exporter vs. einheitliche Agenten) ist eine der zentralen Entscheidungsfragen in Kapitel 6.</text:span></text:p>
      <text:h text:style-name="Heading_20_1" text:outline-level="1"><text:bookmark-start text:name="bm12"/>4. Domänen im Detail<text:bookmark-end text:name="bm12"/></text:h>
      <text:h text:style-name="Heading_20_2" text:outline-level="2"><text:bookmark-start text:name="bm13"/>4.1 Infrastruktur-Monitoring<text:bookmark-end text:name="bm13"/></text:h>
      <text:p text:style-name="P13"><text:span text:style-name="T14">Scope: Server (Linux/Windows), Netzwerk, Virtualisierung, Container, Endgeräte und VPN-Anbindung.</text:span></text:p>
      <text:p text:style-name="P13"><text:span text:style-name="T14">Bestehende Komponenten: SCOM für die Microsoft-Kernsysteme, Telegraf/vmagent/VictoriaMetrics für Linux, NNMi für das Netzwerk, Cisco ACI für die Rechenzentrums-Fabric, VMware vSphere für die Virtualisierung sowie Kubernetes mit SUSE Rancher für Container-Workloads.</text:span></text:p>
      <text:p text:style-name="P13"><text:span text:style-name="T15">Diskussionspunkte:</text:span></text:p>
      <text:list text:continue-numbering="true" text:style-name="WWNum2">
        <text:list-item>
          <text:p text:style-name="P2">Einheitliches Tagging-/Labeling-Schema (Standort, Anwendung, Kritikalität) über SCOM und VictoriaMetrics hinweg, um Korrelation in Grafana zu ermöglichen.</text:p>
        </text:list-item>
        <text:list-item>
          <text:p text:style-name="P2">VPN-/Notebook-Monitoring (rund 200.000 Geräte) eher über ein noch zu beschaffendes Endpoint-Monitoring-/DEX-Tool als über klassisches Infrastruktur-Monitoring abbilden — vertiefend in Kapitel 6.7, inkl. Zusammenspiel mit Netzwerk-, Packet-Inspection- und APM-Monitoring.</text:p>
        </text:list-item>
        <text:list-item>
          <text:p text:style-name="P2">Konsolidierte Sicht auf Hardware- und Hypervisor-Ebene über vSphere und VictoriaMetrics.</text:p>
        </text:list-item>
      </text:list>
      <text:h text:style-name="Heading_20_2" text:outline-level="2"><text:bookmark-start text:name="bm14"/>4.2 Application Performance Monitoring (APM)<text:bookmark-end text:name="bm14"/></text:h>
      <text:p text:style-name="P13"><text:span text:style-name="T14">Scope: rund 100 Fachanwendungen, sowohl Microservices auf Kubernetes als auch klassische Anwendungen auf virtuellen Maschinen.</text:span></text:p>
      <text:p text:style-name="P13"><text:span text:style-name="T14">Bestehende Komponenten: Tempo für verteiltes Tracing, ergänzt durch Metriken (VictoriaMetrics) und Logs (Loki/OpenSearch/Elasticsearch) entsprechend den drei Säulen der Observability. Für Fachanwendungen ohne API-Zugriff bzw. ohne Möglichkeit zur Code-Instrumentierung (insbesondere Citrix-/Fat-Client-/Terminal-Server-Anwendungen) ergänzt Automai dies um robotic-/bildschirmbasiertes synthetisches Monitoring aus Anwendersicht.</text:span></text:p>
      <text:p text:style-name="P13"><text:span text:style-name="T15">Diskussionspunkte:</text:span></text:p>
      <text:list text:continue-numbering="true" text:style-name="WWNum2">
        <text:list-item>
          <text:p text:style-name="P2">Einheitlicher Instrumentierungsstandard — empfohlen: OpenTelemetry als herstellerneutraler Standard für Traces, Metriken und Logs, kompatibel mit Tempo, für alle dafür geeigneten Fachanwendungen.</text:p>
        </text:list-item>
        <text:list-item>
          <text:p text:style-name="P2">Priorisierung der 100 Fachanwendungen nach fachlicher Kritikalität für einen gestaffelten Rollout; gleichzeitig Abgrenzung, welche Anwendungen mangels API/Code-Zugriff dauerhaft auf Automai statt OpenTelemetry angewiesen sind.</text:p>
        </text:list-item>
        <text:list-item>
          <text:p text:style-name="P2">Korrelation von Trace, Log und Metrik über eine gemeinsame Trace-ID in den Log-Zeilen — für Automai-basiertes Monitoring ist eine äquivalente Korrelation (z. B. über Zeitstempel/Transaktionskennung) zu klären, da hier keine Trace-ID im klassischen Sinn existiert.</text:p>
        </text:list-item>
      </text:list>
      <text:h text:style-name="Heading_20_2" text:outline-level="2"><text:bookmark-start text:name="bm15"/>4.3 Security / SIEM<text:bookmark-end text:name="bm15"/></text:h>
      <text:p text:style-name="P13"><text:span text:style-name="T14">Scope: sicherheitsrelevante Events, Audit-Logs und der besondere Schutzbedarf von Sozialdaten.</text:span></text:p>
      <text:p text:style-name="P13"><text:span text:style-name="T14">Bestehende Komponenten: Es ist bereits ein SIEM-System sowie ein eigenes CERT (Computer Emergency Response Team) etabliert. Die Domäne ist damit organisatorisch und technisch verankert; die genaue Produktauswahl des SIEM sowie der Aufgaben- und Eskalationsumfang des CERT sind im weiteren Dialog zu präzisieren.</text:span></text:p>
      <text:p text:style-name="P13"><text:soft-page-break/><text:span text:style-name="T15">Anforderungen aus Compliance-Sicht:</text:span></text:p>
      <text:list text:continue-numbering="true" text:style-name="WWNum2">
        <text:list-item>
          <text:p text:style-name="P2">Nachvollziehbarkeit von Zugriffen auf Sozialdaten gemäß Sozialgeheimnis (§ 35 SGB I, §§ 67 ff. SGB X) und DSGVO Art. 9 (besondere Kategorien personenbezogener Daten).</text:p>
        </text:list-item>
        <text:list-item>
          <text:p text:style-name="P2">Revisionssichere, möglichst unveränderliche Protokollierung von Zugriffen und administrativen Eingriffen.</text:p>
        </text:list-item>
        <text:list-item>
          <text:p text:style-name="P2">Ausgleich zwischen Aufbewahrungspflichten für Audit-Zwecke und Löschpflichten für personenbezogene Inhalte.</text:p>
        </text:list-item>
        <text:list-item>
          <text:p text:style-name="P2">BSI IT-Grundschutz als Rahmen, insbesondere die Bausteine zu Protokollierung sowie Detektion und Reaktion.</text:p>
        </text:list-item>
      </text:list>
      <text:p text:style-name="P13"><text:span text:style-name="T15">Diskussionspunkte:</text:span></text:p>
      <text:list text:continue-numbering="true" text:style-name="WWNum2">
        <text:list-item>
          <text:p text:style-name="P2">Welche Log- und Event-Quellen aus den Domänen Infrastruktur, APM und Business/KPI sind bereits an das SIEM angebunden, und wo bestehen noch Abdeckungslücken (z. B. SCOM, Cisco ACI, NNMi, Cloud-Plattformen)?</text:p>
        </text:list-item>
        <text:list-item>
          <text:p text:style-name="P2">Wie ist die Eskalationskette zwischen SIEM, CERT und dem ServiceNow-Incident-Prozess organisatorisch und technisch ausgestaltet?</text:p>
        </text:list-item>
        <text:list-item>
          <text:p text:style-name="P2">Welche Playbooks bzw. Automatisierungen stehen dem CERT für eine automatisierte Erstreaktion auf sicherheitsrelevante Vorfälle zur Verfügung?</text:p>
        </text:list-item>
        <text:list-item>
          <text:p text:style-name="P2">Basiert das bestehende SIEM auf OpenSearch/Elastic Security oder einem separaten Produkt? Diese Frage hängt eng mit der Log-Konsolidierungsfrage aus Kapitel 6 zusammen.</text:p>
        </text:list-item>
        <text:list-item>
          <text:p text:style-name="P2">Auf welcher Ebene soll Netzwerk-Verkehrsanalyse (Packet Inspection) als zusätzliche Erkennungsquelle für das SIEM eingeführt werden? Vertiefende Analyse inkl. Mitbestimmungspflicht in Kapitel 6.5.</text:p>
        </text:list-item>
      </text:list>
      <text:h text:style-name="Heading_20_2" text:outline-level="2"><text:bookmark-start text:name="bm16"/>4.4 Business- / KPI-Monitoring<text:bookmark-end text:name="bm16"/></text:h>
      <text:p text:style-name="P13"><text:span text:style-name="T14">Scope: Online-Angebot und Bürger-Self-Service sowie übergreifende Geschäftsprozesskennzahlen.</text:span></text:p>
      <text:p text:style-name="P13"><text:span text:style-name="T14">Bestehende Komponenten: CatchPoint liefert über synthetisches Monitoring und Real User Monitoring bereits eine Außensicht auf Verfügbarkeit und Performance des Online-Angebots.</text:span></text:p>
      <text:p text:style-name="P13"><text:span text:style-name="T15">Diskussionspunkte:</text:span></text:p>
      <text:list text:continue-numbering="true" text:style-name="WWNum2">
        <text:list-item>
          <text:p text:style-name="P2">Gemeinsame Definition fachlicher KPIs/SLOs mit den Fachbereichen (z. B. Verfügbarkeit des Bürgerportals, Antwortzeiten kritischer Online-Verfahren).</text:p>
        </text:list-item>
        <text:list-item>
          <text:p text:style-name="P2">Grafana-Business-Dashboards auf Basis fachlicher statt rein technischer Metriken.</text:p>
        </text:list-item>
        <text:list-item>
          <text:p text:style-name="P2">Verbindung von technischer Performance (APM) und Geschäftskennzahlen, z. B. abgebrochene Online-Anträge bei Performance-Problemen.</text:p>
        </text:list-item>
      </text:list>
      <text:h text:style-name="Heading_20_1" text:outline-level="1"><text:bookmark-start text:name="bm17"/>5. Querschnittsthemen<text:bookmark-end text:name="bm17"/></text:h>
      <text:h text:style-name="Heading_20_2" text:outline-level="2"><text:bookmark-start text:name="bm18"/>5.1 Alerting und Eskalation<text:bookmark-end text:name="bm18"/></text:h>
      <text:p text:style-name="P13"><text:span text:style-name="T14">Grafana Alerting und SCOM-Alerts bilden die technische Alarmquelle für Infrastruktur und Anwendungen. Sicherheitsrelevante Events werden zusätzlich vom SIEM erkannt und an das CERT eskaliert. ServiceNow fungiert übergreifend als zentrale Eskalations- und Incident-Drehscheibe.</text:span></text:p>
      <text:p text:style-name="P13"><text:soft-page-break/><text:span text:style-name="T14">Diskussionspunkt: Ein einheitliches Schweregrad- und Prioritätsschema über alle Domänen und Tools hinweg ist erforderlich, um Alert-Flut („Alert Fatigue“) zu vermeiden. ServiceNow ITOM Event Management kann hierzu zusätzlich beitragen, indem es Events vor der Incident-Erstellung dedupliziert und korreliert (siehe Kapitel 6.6).</text:span></text:p>
      <text:h text:style-name="Heading_20_2" text:outline-level="2"><text:bookmark-start text:name="bm19"/>5.2 Datenhaltung, Aufbewahrung und Löschung<text:bookmark-end text:name="bm19"/></text:h>
      <text:p text:style-name="P13"><text:span text:style-name="T14">Unterschiedliche Datenarten erfordern unterschiedliche Aufbewahrungsstrategien: Metriken werden meist hochauflösend kurz- bis mittelfristig und danach aggregiert vorgehalten, Logs unterliegen teils langen Aufbewahrungspflichten bei Security-Relevanz, gleichzeitig aber kurzen Löschfristen bei personenbezogenen Inhalten; Traces sind in der Regel kurzlebig.</text:span></text:p>
      <text:p text:style-name="P13"><text:span text:style-name="T14">Besondere Sorgfalt ist bei Logs erforderlich, die Bezüge zu Sozialdaten enthalten könnten (z. B. in Anwendungs- oder Zugriffslogs) — eine Pseudonymisierung oder Maskierung in der Log-Pipeline ist zu prüfen.</text:span></text:p>
      <text:h text:style-name="Heading_20_2" text:outline-level="2"><text:bookmark-start text:name="bm20"/>5.3 Zugriffskonzept und Rollen<text:bookmark-end text:name="bm20"/></text:h>
      <text:list text:continue-numbering="true" text:style-name="WWNum2">
        <text:list-item>
          <text:p text:style-name="P2">Rollenbasierter Zugriff (RBAC) in Grafana, SCOM und OpenSearch entsprechend dem jeweiligen Verantwortungsbereich (Infrastruktur-, Anwendungs-, Security-Team, Fachbereich).</text:p>
        </text:list-item>
        <text:list-item>
          <text:p text:style-name="P2">Strikte Trennung des Zugriffs auf Security-/Audit-Daten vom operativen Infrastruktur-Monitoring.</text:p>
        </text:list-item>
      </text:list>
      <text:h text:style-name="Heading_20_2" text:outline-level="2"><text:bookmark-start text:name="bm21"/>5.4 Skalierbarkeit und Performance<text:bookmark-end text:name="bm21"/></text:h>
      <text:list text:continue-numbering="true" text:style-name="WWNum2">
        <text:list-item>
          <text:p text:style-name="P2">Konkrete Kapazitätsannahme: ca. 10 TB Log-Volumen pro Tag bei 30 Tagen Aufbewahrung ergeben rund 300 TB aktive Rohdaten im Bestand. Je Backend wirkt sich das sehr unterschiedlich auf den tatsächlichen Speicherbedarf aus (siehe vertiefende Analyse in Kapitel 6.4).</text:p>
        </text:list-item>
        <text:list-item>
          <text:p text:style-name="P2">Cardinality-Management in VictoriaMetrics, Sharding-/Index-Strategie in OpenSearch/Elasticsearch, Retention-Tiering (Hot/Warm/Cold) sind bei dieser Größenordnung zwingend, nicht optional.</text:p>
        </text:list-item>
        <text:list-item>
          <text:p text:style-name="P2">Kapazitätsplanung für 20.000 Server, 100 Fachanwendungen und 200.000 Endgeräte muss zusätzlich Lastspitzen (typischerweise das 3- bis 5-Fache der mittleren Ingest-Rate) berücksichtigen.</text:p>
        </text:list-item>
        <text:list-item>
          <text:p text:style-name="P2">Hochverfügbarkeit der zentralen Beobachtungsplattform selbst, damit das Monitoring-System nicht zum eigenen blinden Fleck wird.</text:p>
        </text:list-item>
      </text:list>
      <text:h text:style-name="Heading_20_2" text:outline-level="2"><text:bookmark-start text:name="bm22"/>5.5 Kosten<text:bookmark-end text:name="bm22"/></text:h>
      <text:list text:continue-numbering="true" text:style-name="WWNum2">
        <text:list-item>
          <text:p text:style-name="P2">Lizenzkosten (SCOM, CatchPoint, ServiceNow, Automai, ggf. Elasticsearch-Subscription) im Verhältnis zu den Betriebskosten des Open-Source-Stacks (VictoriaMetrics, Grafana, Loki, Tempo, OpenSearch).</text:p>
        </text:list-item>
        <text:list-item>
          <text:p text:style-name="P2">Konsolidierungspotenzial bei den parallel betriebenen Log-Systemen als wesentlicher Kostenhebel.</text:p>
        </text:list-item>
      </text:list>
      <text:h text:style-name="Heading_20_1" text:outline-level="1"><text:bookmark-start text:name="bm23"/>6. Tool-Bewertung und Entscheidungsgrundlage<text:bookmark-end text:name="bm23"/></text:h>
      <text:h text:style-name="Heading_20_2" text:outline-level="2"><text:bookmark-start text:name="bm24"/>6.1 Bewertungskriterien<text:bookmark-end text:name="bm24"/></text:h>
      <text:p text:style-name="P13"><text:span text:style-name="T14">Für die in Kapitel 6.2 aufgeführten Entscheidungsfragen werden folgende Kriterien als Bewertungsrahmen vorgeschlagen:</text:span></text:p>
      <text:list text:continue-numbering="true" text:style-name="WWNum2">
        <text:list-item>
          <text:p text:style-name="P2">Abdeckung der jeweiligen Domäne (Infrastruktur, APM, Security, Business/KPI)</text:p>
        </text:list-item>
        <text:list-item>
          <text:p text:style-name="P2">Integrationsfähigkeit und Offenheit der Schnittstellen zum zentralen Cockpit</text:p>
        </text:list-item>
        <text:list-item>
          <text:p text:style-name="P2">Skalierbarkeit auf die genannte Größenordnung (20.000 Server, 100 Fachanwendungen, 200.000 Endgeräte)</text:p>
        </text:list-item>
        <text:list-item>
          <text:p text:style-name="P2"><text:soft-page-break/>Compliance-Eignung, insbesondere Datenresidenz und Mandantentrennung bei Sozialdaten</text:p>
        </text:list-item>
        <text:list-item>
          <text:p text:style-name="P2">Betriebsaufwand und benötigtes Spezial-Know-how</text:p>
        </text:list-item>
        <text:list-item>
          <text:p text:style-name="P2">Lizenzmodell und Kostenstruktur</text:p>
        </text:list-item>
      </text:list>
      <text:h text:style-name="Heading_20_2" text:outline-level="2"><text:bookmark-start text:name="bm25"/>6.2 Zentrale Entscheidungsfragen<text:bookmark-end text:name="bm25"/></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Standard"><text:span text:style-name="T16">Thema</text:span></text:p>
            </table:table-cell>
            <table:table-cell table:style-name="Table2.A1" office:value-type="string">
              <text:p text:style-name="Standard"><text:span text:style-name="T16">Kernfrage</text:span></text:p>
            </table:table-cell>
            <table:table-cell table:style-name="Table2.A1" office:value-type="string">
              <text:p text:style-name="Standard"><text:span text:style-name="T16">Optionen zur Diskussion</text:span></text:p>
            </table:table-cell>
          </table:table-row>
        </table:table-header-rows>
        <table:table-row table:style-name="Table2.1">
          <table:table-cell table:style-name="Table2.A2" office:value-type="string">
            <text:p text:style-name="P14"><text:span text:style-name="T17">Log-Konsolidierung</text:span></text:p>
          </table:table-cell>
          <table:table-cell table:style-name="Table2.B2" office:value-type="string">
            <text:p text:style-name="P14"><text:span text:style-name="T17">Sollen Loki, OpenSearch und Elasticsearch dauerhaft parallel betrieben werden?</text:span></text:p>
          </table:table-cell>
          <table:table-cell table:style-name="Table2.C2" office:value-type="string">
            <text:p text:style-name="P14"><text:span text:style-name="T17">Vertiefende Analyse in Kapitel 6.4: Empfehlung ist Elasticsearch in OpenSearch zu konsolidieren, Loki für hochvolumige Infrastruktur-/Kubernetes-Logs zu behalten</text:span></text:p>
          </table:table-cell>
        </table:table-row>
        <table:table-row table:style-name="Table2.1">
          <table:table-cell table:style-name="Table2.A3" office:value-type="string">
            <text:p text:style-name="P14"><text:span text:style-name="T17">SCOM-Integration</text:span></text:p>
          </table:table-cell>
          <table:table-cell table:style-name="Table2.A3" office:value-type="string">
            <text:p text:style-name="P14"><text:span text:style-name="T17">Wie wird die Windows-Welt mit dem zentralen Cockpit verbunden?</text:span></text:p>
          </table:table-cell>
          <table:table-cell table:style-name="Table2.A3" office:value-type="string">
            <text:p text:style-name="P14"><text:span text:style-name="T17">a) SCOM als Grafana-Datenquelle einbinden <text:s text:c="2"/>b) SCOM perspektivisch durch Windows-Exporter/Telegraf ablösen</text:span></text:p>
          </table:table-cell>
        </table:table-row>
        <table:table-row table:style-name="Table2.1">
          <table:table-cell table:style-name="Table2.A4" office:value-type="string">
            <text:p text:style-name="P14"><text:span text:style-name="T17">SIEM-Integration</text:span></text:p>
          </table:table-cell>
          <table:table-cell table:style-name="Table2.B4" office:value-type="string">
            <text:p text:style-name="P14"><text:span text:style-name="T17">Welche Log- und Event-Quellen sind bereits an das vorhandene SIEM angebunden, welche fehlen noch?</text:span></text:p>
          </table:table-cell>
          <table:table-cell table:style-name="Table2.C4" office:value-type="string">
            <text:p text:style-name="P14"><text:span text:style-name="T17">Abgleich der Ist-Anbindung je Domäne (Infrastruktur, APM, Business/KPI) gemeinsam mit dem CERT; Priorisierung der Lückenschließung</text:span></text:p>
          </table:table-cell>
        </table:table-row>
        <table:table-row table:style-name="Table2.1">
          <table:table-cell table:style-name="Table2.A3" office:value-type="string">
            <text:p text:style-name="P14"><text:span text:style-name="T17">Cloud-Monitoring</text:span></text:p>
          </table:table-cell>
          <table:table-cell table:style-name="Table2.A3" office:value-type="string">
            <text:p text:style-name="P14"><text:span text:style-name="T17">Wie werden AWS, Azure und StackIT in die zentrale Plattform integriert?</text:span></text:p>
          </table:table-cell>
          <table:table-cell table:style-name="Table2.A3" office:value-type="string">
            <text:p text:style-name="P14"><text:span text:style-name="T17">a) native Cloud-Tools plus Export in die zentrale Plattform <text:s text:c="2"/>b) einheitliche Agenten (Telegraf/OpenTelemetry) über alle Umgebungen</text:span></text:p>
          </table:table-cell>
        </table:table-row>
        <table:table-row table:style-name="Table2.1">
          <table:table-cell table:style-name="Table2.A6" office:value-type="string">
            <text:p text:style-name="P14"><text:span text:style-name="T17">Automai-Integration</text:span></text:p>
          </table:table-cell>
          <table:table-cell table:style-name="Table2.B6" office:value-type="string">
            <text:p text:style-name="P14"><text:span text:style-name="T17">Wie werden die synthetischen Testergebnisse von Automai in das zentrale Cockpit und Alerting eingebunden?</text:span></text:p>
          </table:table-cell>
          <table:table-cell table:style-name="Table2.C6" office:value-type="string">
            <text:p text:style-name="P14"><text:span text:style-name="T17">Klärung, ob Automai-Ergebnisse direkt in Grafana einfließen oder über einen separaten Datenexport/Connector angebunden werden</text:span></text:p>
          </table:table-cell>
        </table:table-row>
        <table:table-row table:style-name="Table2.1">
          <table:table-cell table:style-name="Table2.A3" office:value-type="string">
            <text:p text:style-name="P14"><text:span text:style-name="T17">Packet Inspection</text:span></text:p>
          </table:table-cell>
          <table:table-cell table:style-name="Table2.A3" office:value-type="string">
            <text:p text:style-name="P14"><text:span text:style-name="T17">Auf welcher Ebene (Metadaten/Flow, Signatur-IDS, Payload-Inspektion) soll Netzwerk-Verkehrsanalyse eingeführt werden?</text:span></text:p>
          </table:table-cell>
          <table:table-cell table:style-name="Table2.A3" office:value-type="string">
            <text:p text:style-name="P14"><text:span text:style-name="T17">Vertiefende Analyse in Kapitel 6.5: Stufenmodell empfohlen; Payload-Inspektion mit TLS-Interception nur mit vorheriger Personalrats-Beteiligung (§ 80 Abs. 1 Nr. 21 BPersVG) und DSFA</text:span></text:p>
          </table:table-cell>
        </table:table-row>
        <table:table-row table:style-name="Table2.1">
          <table:table-cell table:style-name="Table2.A8" office:value-type="string">
            <text:p text:style-name="P14"><text:span text:style-name="T17">ITOM-Lizenzierung</text:span></text:p>
          </table:table-cell>
          <table:table-cell table:style-name="Table2.B8" office:value-type="string">
            <text:p text:style-name="P14"><text:span text:style-name="T17">Welche ServiceNow-ITOM-Lizenzstufe ist aktuell vorhanden, und wie hoch ist die CMDB-Abdeckung?</text:span></text:p>
          </table:table-cell>
          <table:table-cell table:style-name="Table2.C8" office:value-type="string">
            <text:p text:style-name="P14"><text:span text:style-name="T17">Vertiefende Analyse in Kapitel 6.6: AIOps/Probable-RCA erfordert ITOM Health Advanced/Enterprise; CSDM-Einführung ist davon unabhängig sinnvoll</text:span></text:p>
          </table:table-cell>
        </table:table-row>
        <table:table-row table:style-name="Table2.1">
          <table:table-cell table:style-name="Table2.A3" office:value-type="string">
            <text:p text:style-name="P14"><text:span text:style-name="T17">Endpoint-Monitoring-Beschaffung</text:span></text:p>
          </table:table-cell>
          <table:table-cell table:style-name="Table2.A3" office:value-type="string">
            <text:p text:style-name="P14"><text:span text:style-name="T17">Welches Tool deckt Endpoint-Monitoring für rund 200.000 Notebooks ab, und wie wird Mitbestimmung organisiert?</text:span></text:p>
          </table:table-cell>
          <table:table-cell table:style-name="Table2.A3" office:value-type="string">
            <text:p text:style-name="P14"><text:span text:style-name="T17">Vertiefende Analyse in Kapitel 6.7: Marktüberblick (Nexthink, Lakeside, ControlUp, Microsoft Intune/Endpoint Analytics); Personalrats-Beteiligung gemäß § 80 Abs. 1 Nr. 21 BPersVG von Beginn an einplanen</text:span></text:p>
          </table:table-cell>
        </table:table-row>
      </table:table>
      <text:p text:style-name="P9"><text:span text:style-name="T8">Tabelle 2: Offene Entscheidungsfragen als Grundlage für den weiteren Dialog</text:span></text:p>
      <text:h text:style-name="Heading_20_2" text:outline-level="2"><text:bookmark-start text:name="bm26"/>6.3 Vorläufige Empfehlung (zur Diskussion)<text:bookmark-end text:name="bm26"/></text:h>
      <text:list text:continue-numbering="true" text:style-name="WWNum2">
        <text:list-item>
          <text:p text:style-name="P2">Kurzfristig: Grafana als verbindliches zentrales Cockpit für alle vier Domänen festschreiben; SCOM und CatchPoint als Datenquellen anbinden statt zu ersetzen.</text:p>
        </text:list-item>
        <text:list-item>
          <text:p text:style-name="P2">Mittelfristig: Log-Landschaft konsolidieren bzw. Zuständigkeiten klar abgrenzen; SIEM-Anbindung gemeinsam mit dem CERT vervollständigen.</text:p>
        </text:list-item>
        <text:list-item>
          <text:p text:style-name="P2">Langfristig: Einheitlichen Instrumentierungsstandard (OpenTelemetry) für alle neuen Fachanwendungen verbindlich vorgeben.</text:p>
        </text:list-item>
      </text:list>
      <text:h text:style-name="Heading_20_2" text:outline-level="2"><text:bookmark-start text:name="bm27"/>6.4 Vertiefung: Konsolidiertes Logging bei 10 TB/Tag und 30 Tagen Aufbewahrung<text:bookmark-end text:name="bm27"/></text:h>
      <text:p text:style-name="P13"><text:span text:style-name="T14">Diese Vertiefung wurde auf Basis der Annahme von rund 10 TB Log-Volumen pro Tag und 30 Tagen Aufbewahrung erarbeitet — das entspricht ca. 300 TB aktiven Rohdaten im Bestand bzw. einer mittleren Ingest-Rate von rund 116 MB/s (Lastspitzen typischerweise das 3- bis 5-Fache).</text:span></text:p>
      <text:h text:style-name="Heading_20_3" text:outline-level="3">Speichercharakteristik je Backend</text:h>
      <text:list text:continue-numbering="true" text:style-name="WWNum2">
        <text:list-item>
          <text:p text:style-name="P2"><text:soft-page-break/>Loki: ca. 25–35 TB komprimiert im Objektspeicher — Chunk-Komprimierung (Faktor 10–15×), kein Volltextindex, nur Labels werden indiziert.</text:p>
        </text:list-item>
        <text:list-item>
          <text:p text:style-name="P2">OpenSearch/Elasticsearch: ca. 300–600 TB je nach Replica-Faktor — der Volltextindex bringt die Indexgröße nahe an die Rohdatengröße, eine Replica verdoppelt das.</text:p>
        </text:list-item>
        <text:list-item>
          <text:p text:style-name="P2">Graylog: vergleichbar mit OpenSearch/Elasticsearch, da eines der beiden als Speicher-Backend genutzt wird, zzgl. eigener Message-Journal-Schicht als Puffer.</text:p>
        </text:list-item>
      </text:list>
      <text:h text:style-name="Heading_20_3" text:outline-level="3">Vor- und Nachteile vollständiger Konsolidierung</text:h>
      <text:p text:style-name="P13"><text:span text:style-name="T14">Dafür spricht: eine einheitliche Zugriffs-/RBAC-Policy statt drei, einfacherer Compliance-Nachweis, durchgängige Korrelation über Domänengrenzen (relevant für das CERT bei Incident-Response), geringerer Betriebsaufwand und Skaleneffekte bei Hardware/Lizenzen.</text:span></text:p>
      <text:p text:style-name="P13"><text:span text:style-name="T14">Dagegen spricht: „One size fits all“ ist bei 10 TB/Tag teuer — alle Logs durch eine Volltext-Indexierung zu schicken, nur weil ein Teil davon (Security/Audit) das benötigt, verschwendet Rechenleistung für die Masse unkritischer Infrastruktur-Logs. Hinzu kommen ein Single Point of Failure und Single Point of Compromise, ein nicht triviales Migrationsrisiko bei dieser Größenordnung sowie potenzieller Vendor-Lock-in.</text:span></text:p>
      <text:h text:style-name="Heading_20_3" text:outline-level="3">Welche Produkte erfüllen die Compliance-Anforderungen?</text:h>
      <text:p text:style-name="P13"><text:span text:style-name="T14">Wichtiger Vorbehalt: Kein Produkt ist von sich aus „BSI-konform“ oder „DSGVO-zertifiziert“. Compliance entsteht durch den Betrieb — Hosting-Standort, Verschlüsselung, Zugriffskontrolle, Löschkonzept. Bei selbst betriebener Open-Source-Software liegt das vollständig in der eigenen Verantwortung; nur bei SaaS-/Managed-Angeboten (z. B. Elastic Cloud, AWS OpenSearch Service) kommt zusätzlich die BSI-C5-Testierung des Anbieters ins Spiel.</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Standard"><text:span text:style-name="T16">Produkt</text:span></text:p>
            </table:table-cell>
            <table:table-cell table:style-name="Table3.A1" office:value-type="string">
              <text:p text:style-name="Standard"><text:span text:style-name="T16">Lizenz / Governance (Stand 2026)</text:span></text:p>
            </table:table-cell>
            <table:table-cell table:style-name="Table3.A1" office:value-type="string">
              <text:p text:style-name="Standard"><text:span text:style-name="T16">Speicher- und Kostenprofil bei 10 TB/Tag</text:span></text:p>
            </table:table-cell>
            <table:table-cell table:style-name="Table3.A1" office:value-type="string">
              <text:p text:style-name="Standard"><text:span text:style-name="T16">Eignung &amp; Compliance-Hinweis</text:span></text:p>
            </table:table-cell>
          </table:table-row>
        </table:table-header-rows>
        <table:table-row table:style-name="Table3.1">
          <table:table-cell table:style-name="Table3.A2" office:value-type="string">
            <text:p text:style-name="P14"><text:span text:style-name="T17">OpenSearch</text:span></text:p>
          </table:table-cell>
          <table:table-cell table:style-name="Table3.B2" office:value-type="string">
            <text:p text:style-name="P14"><text:span text:style-name="T17">Apache 2.0; seit 09/2024 unter der vendor-neutralen OpenSearch Software Foundation (Linux Foundation)</text:span></text:p>
          </table:table-cell>
          <table:table-cell table:style-name="Table3.C2" office:value-type="string">
            <text:p text:style-name="P14"><text:span text:style-name="T17">Indexgröße nahe Rohdatenvolumen; Hot/Warm/Cold-Tiering erforderlich</text:span></text:p>
          </table:table-cell>
          <table:table-cell table:style-name="Table3.D2" office:value-type="string">
            <text:p text:style-name="P14"><text:span text:style-name="T17">Security-Plugin (RBAC, feldbasierte Berechtigungen, Audit-Log) vollständig kostenfrei; voll souverän selbst hostbar; im PB-Bereich bewährt</text:span></text:p>
          </table:table-cell>
        </table:table-row>
        <table:table-row table:style-name="Table3.1">
          <table:table-cell table:style-name="Table3.A3" office:value-type="string">
            <text:p text:style-name="P14"><text:span text:style-name="T17">Elasticsearch</text:span></text:p>
          </table:table-cell>
          <table:table-cell table:style-name="Table3.A3" office:value-type="string">
            <text:p text:style-name="P14"><text:span text:style-name="T17">Standardvertrieb unter Elastic License v2; seit 09/2024 zusätzlich AGPLv3 als Quellcode-Option bei Eigenkompilierung</text:span></text:p>
          </table:table-cell>
          <table:table-cell table:style-name="Table3.A3" office:value-type="string">
            <text:p text:style-name="P14"><text:span text:style-name="T17">Technisch nahezu identisch zu OpenSearch (gemeinsame Lucene-Basis)</text:span></text:p>
          </table:table-cell>
          <table:table-cell table:style-name="Table3.A3" office:value-type="string">
            <text:p text:style-name="P14"><text:span text:style-name="T17">Im aktuellen Portfolio schlicht redundant zu OpenSearch — naheliegender Konsolidierungskandidat</text:span></text:p>
          </table:table-cell>
        </table:table-row>
        <table:table-row table:style-name="Table3.1">
          <table:table-cell table:style-name="Table3.A4" office:value-type="string">
            <text:p text:style-name="P14"><text:span text:style-name="T17">Loki</text:span></text:p>
          </table:table-cell>
          <table:table-cell table:style-name="Table3.B4" office:value-type="string">
            <text:p text:style-name="P14"><text:span text:style-name="T17">AGPLv3 (Grafana Labs)</text:span></text:p>
          </table:table-cell>
          <table:table-cell table:style-name="Table3.C4" office:value-type="string">
            <text:p text:style-name="P14"><text:span text:style-name="T17">Deutlich günstigster Speicherbedarf (ca. 25–35 TB statt 300+ TB)</text:span></text:p>
          </table:table-cell>
          <table:table-cell table:style-name="Table3.D4" office:value-type="string">
            <text:p text:style-name="P14"><text:span text:style-name="T17">Keine granulare, feldbasierte Zugriffskontrolle — als alleinige Lösung für auditpflichtige Sozialdaten-Zugriffslogs ungeeignet</text:span></text:p>
          </table:table-cell>
        </table:table-row>
        <table:table-row table:style-name="Table3.1">
          <table:table-cell table:style-name="Table3.A3" office:value-type="string">
            <text:p text:style-name="P14"><text:span text:style-name="T17">Graylog</text:span></text:p>
          </table:table-cell>
          <table:table-cell table:style-name="Table3.A3" office:value-type="string">
            <text:p text:style-name="P14"><text:span text:style-name="T17">Open-Source-Kern + kommerzielle Security-Edition; Mitglied der OpenSearch Software Foundation</text:span></text:p>
          </table:table-cell>
          <table:table-cell table:style-name="Table3.A3" office:value-type="string">
            <text:p text:style-name="P14"><text:span text:style-name="T17">Wie OpenSearch/Elasticsearch, zzgl. Bedienlayer</text:span></text:p>
          </table:table-cell>
          <table:table-cell table:style-name="Table3.A3" office:value-type="string">
            <text:p text:style-name="P14"><text:span text:style-name="T17">Explizite Compliance-/Audit-Workflows, im DACH-Raum verbreitet; zusätzlicher Betriebsaufwand gegenüber nativem OpenSearch</text:span></text:p>
          </table:table-cell>
        </table:table-row>
        <table:table-row table:style-name="Table3.1">
          <table:table-cell table:style-name="Table3.A6" office:value-type="string">
            <text:p text:style-name="P14"><text:span text:style-name="T17">Splunk</text:span></text:p>
          </table:table-cell>
          <table:table-cell table:style-name="Table3.B6" office:value-type="string">
            <text:p text:style-name="P14"><text:span text:style-name="T17">Kommerziell, volumenbasiert lizenziert</text:span></text:p>
          </table:table-cell>
          <table:table-cell table:style-name="Table3.C6" office:value-type="string">
            <text:p text:style-name="P14"><text:span text:style-name="T17">Sehr hohe Lizenzkosten bei diesem Ingest-Volumen</text:span></text:p>
          </table:table-cell>
          <table:table-cell table:style-name="Table3.D6" office:value-type="string">
            <text:p text:style-name="P14"><text:span text:style-name="T17">Technisch exzellent und breit zertifiziert; nur wirtschaftlich sinnvoll, falls das vorhandene SIEM bereits Splunk ist</text:span></text:p>
          </table:table-cell>
        </table:table-row>
      </table:table>
      <text:p text:style-name="P9"><text:span text:style-name="T8">Tabelle 3: Produktvergleich für konsolidiertes Logging bei ca. 10 TB/Tag Ingest-Volumen</text:span></text:p>
      <text:h text:style-name="Heading_20_3" text:outline-level="3">Empfehlung: risikoarme Zweiteilung statt Vollkonsolidierung</text:h>
      <text:list text:continue-numbering="true" text:style-name="WWNum2">
        <text:list-item>
          <text:p text:style-name="P2">Elasticsearch in OpenSearch konsolidieren: technisch naheliegend (gemeinsamer Lucene-Unterbau, nahezu API-kompatibel), eliminiert eines der drei Systeme, volle Security-Features ohne Lizenzkosten.</text:p>
        </text:list-item>
        <text:list-item>
          <text:p text:style-name="P2">Loki für hochvolumige Infrastruktur-/Kubernetes-Logs beibehalten: Bei 10 TB/Tag ist der Kostenunterschied zu OpenSearch erheblich — hier lohnt sich Konsolidierung nicht.</text:p>
        </text:list-item>
        <text:list-item>
          <text:p text:style-name="P2">Sozialdaten-relevante Zugriffs- und Audit-Logs nicht in den allgemeinen OpenSearch-Pool überführen, sondern ins bestehende SIEM bzw. einen gesondert abgesicherten Index mit strengerem RBAC und längerer, möglichst unveränderlicher Aufbewahrung leiten.</text:p>
        </text:list-item>
      </text:list>
      <text:p text:style-name="P13"><text:span text:style-name="T14">Damit wird aus drei Systemen — zwei Systeme plus ein SIEM-Sonderpfad für Sozialdaten. Ein zusätzlicher Vorbehalt: 30 Tage Aufbewahrung mögen für allgemeine Infrastruktur-Logs ausreichen, sind für sicherheits- und auditrelevante Zugriffe auf Sozialdaten aber häufig zu kurz — dies sollte mit der Rechts-/Datenschutzabteilung verifiziert werden, nicht nur technisch festgelegt werden.</text:span></text:p>
      <text:h text:style-name="Heading_20_2" text:outline-level="2"><text:bookmark-start text:name="bm28"/>6.5 Vertiefung: Packet Inspection / Netzwerk-Verkehrsanalyse<text:bookmark-end text:name="bm28"/></text:h>
      <text:p text:style-name="P13"><text:soft-page-break/><text:span text:style-name="T14">Netzwerk-Verkehrsanalyse gehört architektonisch in die Security-Domäne als zusätzliche Erfassungsquelle für das SIEM. Compliance-rechtlich ist sie jedoch eine eigene Kategorie: Sie ist objektiv geeignet, das Verhalten oder die Leistung von Beschäftigten zu überwachen, und löst damit unabhängig von der erklärten Zweckbestimmung eine eigenständige Beteiligungspflicht aus.</text:span></text:p>
      <text:h text:style-name="Heading_20_3" text:outline-level="3">Rechtlicher Rahmen</text:h>
      <text:list text:continue-numbering="true" text:style-name="WWNum2">
        <text:list-item>
          <text:p text:style-name="P2">§ 80 Abs. 1 Nr. 21 BPersVG (bis 14.06.2021: § 75 Abs. 3 Nr. 17 BPersVG a. F., inhaltsgleich): Mitbestimmung des Personalrats bei der Einführung technischer Einrichtungen, die zur Verhaltens- oder Leistungskontrolle geeignet sind. Die Rechtsprechung des BVerwG wendet eine objektiv-finale Betrachtung an — die Absicht der Dienststelle ist unerheblich.</text:p>
        </text:list-item>
        <text:list-item>
          <text:p text:style-name="P2">Fernmeldegeheimnis (Art. 10 GG, § 3 TTDSG): Bei Mitlesen von Kommunikationsinhalten (E-Mail, VoIP), nicht nur Metadaten, ist eine zusätzliche, strengere Rechtsgrundlage erforderlich.</text:p>
        </text:list-item>
        <text:list-item>
          <text:p text:style-name="P2">Sozialgeheimnis-Überschneidung: Macht Payload-Inspektion (insbesondere mit TLS-Interception) Anwendungsverkehr mit Sozialdatenbezug im Klartext sichtbar, wird der Inspektionspunkt selbst zu einer Sozialdaten-Verarbeitungsstelle mit denselben strengen Anforderungen wie das SIEM.</text:p>
        </text:list-item>
        <text:list-item>
          <text:p text:style-name="P2">DSGVO Art. 35: Bei systematischer, umfangreicher Überwachung ist regelmäßig eine Datenschutz-Folgenabschätzung erforderlich.</text:p>
        </text:list-item>
      </text:list>
      <text:h text:style-name="Heading_20_3" text:outline-level="3">Empfehlung: Stufenmodell statt Pauschallösung</text:h>
      <text:list text:continue-numbering="true" text:style-name="WWNum2">
        <text:list-item>
          <text:p text:style-name="P2">Flow-/Metadatenanalyse (kein Payload): niedrigstes Risiko, für Baseline und Anomalieerkennung in der Regel ausreichend.</text:p>
        </text:list-item>
        <text:list-item>
          <text:p text:style-name="P2">Signaturbasiertes Netzwerk-IDS ohne TLS-Interception: mittleres Risiko, BSI-konforme Standardpraxis.</text:p>
        </text:list-item>
        <text:list-item>
          <text:p text:style-name="P2">Volltext-Payload-Inspektion mit TLS-Bruch: höchstes Risiko — nur in eng begründeten Ausnahmefällen, mit Datenschutz-Folgenabschätzung und vorheriger Personalrats-Beteiligung.</text:p>
        </text:list-item>
      </text:list>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Standard"><text:span text:style-name="T16">Ansatz / Produkt</text:span></text:p>
            </table:table-cell>
            <table:table-cell table:style-name="Table4.A1" office:value-type="string">
              <text:p text:style-name="Standard"><text:span text:style-name="T16">Sichtbarkeitsebene</text:span></text:p>
            </table:table-cell>
            <table:table-cell table:style-name="Table4.A1" office:value-type="string">
              <text:p text:style-name="Standard"><text:span text:style-name="T16">Compliance-Risiko</text:span></text:p>
            </table:table-cell>
            <table:table-cell table:style-name="Table4.A1" office:value-type="string">
              <text:p text:style-name="Standard"><text:span text:style-name="T16">Passung zur Landschaft</text:span></text:p>
            </table:table-cell>
          </table:table-row>
        </table:table-header-rows>
        <table:table-row table:style-name="Table4.1">
          <table:table-cell table:style-name="Table4.A2" office:value-type="string">
            <text:p text:style-name="P14"><text:span text:style-name="T17">Cisco Secure Network Analytics (vormals Stealthwatch) + Encrypted Traffic Analytics</text:span></text:p>
          </table:table-cell>
          <table:table-cell table:style-name="Table4.B2" office:value-type="string">
            <text:p text:style-name="P14"><text:span text:style-name="T17">Verbindungsmetadaten (NetFlow/IPFIX) inkl. Anomalien in verschlüsseltem Verkehr (SNI, Zertifikatsmerkmale) ohne Entschlüsselung</text:span></text:p>
          </table:table-cell>
          <table:table-cell table:style-name="Table4.C2" office:value-type="string">
            <text:p text:style-name="P14"><text:span text:style-name="T17">Niedrig — kein Payload, keine Entschlüsselung</text:span></text:p>
          </table:table-cell>
          <table:table-cell table:style-name="Table4.D2" office:value-type="string">
            <text:p text:style-name="P14"><text:span text:style-name="T17">Sehr hoch: ACI-Fabric exportiert NetFlow/IPFIX nativ, Cisco-Ökosystem bereits vorhanden</text:span></text:p>
          </table:table-cell>
        </table:table-row>
        <table:table-row table:style-name="Table4.1">
          <table:table-cell table:style-name="Table4.A3" office:value-type="string">
            <text:p text:style-name="P14"><text:span text:style-name="T17">Zeek / Suricata (Open Source)</text:span></text:p>
          </table:table-cell>
          <table:table-cell table:style-name="Table4.A3" office:value-type="string">
            <text:p text:style-name="P14"><text:span text:style-name="T17">Header und unverschlüsselter Payload an Schlüsselsegmenten</text:span></text:p>
          </table:table-cell>
          <table:table-cell table:style-name="Table4.A3" office:value-type="string">
            <text:p text:style-name="P14"><text:span text:style-name="T17">Mittel</text:span></text:p>
          </table:table-cell>
          <table:table-cell table:style-name="Table4.A3" office:value-type="string">
            <text:p text:style-name="P14"><text:span text:style-name="T17">Hoch: Logs lassen sich direkt nach OpenSearch/SIEM einspeisen, passt zur Konsolidierungsempfehlung aus 6.4</text:span></text:p>
          </table:table-cell>
        </table:table-row>
        <table:table-row table:style-name="Table4.1">
          <table:table-cell table:style-name="Table4.A4" office:value-type="string">
            <text:p text:style-name="P14"><text:span text:style-name="T17">Cilium/Hubble, Tetragon, Falco (eBPF)</text:span></text:p>
          </table:table-cell>
          <table:table-cell table:style-name="Table4.B4" office:value-type="string">
            <text:p text:style-name="P14"><text:span text:style-name="T17">L3/L4, optional L7, innerhalb des Kubernetes-Clusters, ohne TLS-Bruch</text:span></text:p>
          </table:table-cell>
          <table:table-cell table:style-name="Table4.C4" office:value-type="string">
            <text:p text:style-name="P14"><text:span text:style-name="T17">Niedrig bis mittel</text:span></text:p>
          </table:table-cell>
          <table:table-cell table:style-name="Table4.D4" office:value-type="string">
            <text:p text:style-name="P14"><text:span text:style-name="T17">Hoch: passt direkt zur bestehenden Rancher-/Kubernetes-Landschaft</text:span></text:p>
          </table:table-cell>
        </table:table-row>
        <table:table-row table:style-name="Table4.1">
          <table:table-cell table:style-name="Table4.A3" office:value-type="string">
            <text:p text:style-name="P14"><text:span text:style-name="T17">AWS VPC Flow Logs / Azure NSG Flow Logs</text:span></text:p>
          </table:table-cell>
          <table:table-cell table:style-name="Table4.A3" office:value-type="string">
            <text:p text:style-name="P14"><text:span text:style-name="T17">Verbindungsmetadaten in der Cloud</text:span></text:p>
          </table:table-cell>
          <table:table-cell table:style-name="Table4.A3" office:value-type="string">
            <text:p text:style-name="P14"><text:span text:style-name="T17">Niedrig</text:span></text:p>
          </table:table-cell>
          <table:table-cell table:style-name="Table4.A3" office:value-type="string">
            <text:p text:style-name="P14"><text:span text:style-name="T17">Schließt die in Kapitel 3.2 offene Cloud-Integrationslücke</text:span></text:p>
          </table:table-cell>
        </table:table-row>
        <table:table-row table:style-name="Table4.1">
          <table:table-cell table:style-name="Table4.A6" office:value-type="string">
            <text:p text:style-name="P14"><text:span text:style-name="T17">Kommerzielle TLS-Interception/SSL-Proxy-Lösungen</text:span></text:p>
          </table:table-cell>
          <table:table-cell table:style-name="Table4.B6" office:value-type="string">
            <text:p text:style-name="P14"><text:span text:style-name="T17">Vollständiger Klartextinhalt auch bei verschlüsselten Verbindungen</text:span></text:p>
          </table:table-cell>
          <table:table-cell table:style-name="Table4.C6" office:value-type="string">
            <text:p text:style-name="P14"><text:span text:style-name="T17">Hoch</text:span></text:p>
          </table:table-cell>
          <table:table-cell table:style-name="Table4.D6" office:value-type="string">
            <text:p text:style-name="P14"><text:span text:style-name="T17">Nur in eng begründeten Ausnahmefällen empfehlenswert; Restrisiko übersteigt meist den Nutzen gegenüber ETA-artigen Ansätzen</text:span></text:p>
          </table:table-cell>
        </table:table-row>
      </table:table>
      <text:p text:style-name="P9"><text:span text:style-name="T8">Tabelle 4: Bewertung von Ansätzen zur Netzwerk-Verkehrsanalyse</text:span></text:p>
      <text:h text:style-name="Heading_20_2" text:outline-level="2"><text:bookmark-start text:name="bm29"/>6.6 Vertiefung: ServiceNow ITOM/CSDM für Fehleranalyse und Kontextualisierung<text:bookmark-end text:name="bm29"/></text:h>
      <text:p text:style-name="P13"><text:span text:style-name="T14">Ja — ServiceNow ITOM kann in Verbindung mit dem Common Service Data Model (CSDM) gezielt zur Fehleranalyse und Kontextualisierung von Events und Incidents beitragen. Drei Bausteine wirken dabei zusammen:</text:span></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Standard"><text:span text:style-name="T16">Baustein</text:span></text:p>
            </table:table-cell>
            <table:table-cell table:style-name="Table5.A1" office:value-type="string">
              <text:p text:style-name="Standard"><text:span text:style-name="T16">Funktion</text:span></text:p>
            </table:table-cell>
            <table:table-cell table:style-name="Table5.A1" office:value-type="string">
              <text:p text:style-name="Standard"><text:span text:style-name="T16">Nutzen für Fehleranalyse / Kontextualisierung</text:span></text:p>
            </table:table-cell>
          </table:table-row>
        </table:table-header-rows>
        <table:table-row table:style-name="Table5.1">
          <table:table-cell table:style-name="Table5.A2" office:value-type="string">
            <text:p text:style-name="P14"><text:span text:style-name="T17">Event Management</text:span></text:p>
          </table:table-cell>
          <table:table-cell table:style-name="Table5.B2" office:value-type="string">
            <text:p text:style-name="P14"><text:span text:style-name="T17">Nimmt Events aus Monitoring-Tools auf, dedupliziert und korreliert sie zu wenigen aussagekräftigen Alerts</text:span></text:p>
          </table:table-cell>
          <table:table-cell table:style-name="Table5.C2" office:value-type="string">
            <text:p text:style-name="P14"><text:span text:style-name="T17">Reduziert Event-Flut um bis zu 99% (Herstellerangabe) — wirkt direkt gegen die in Kapitel 5.1 beschriebene Alert-Fatigue</text:span></text:p>
          </table:table-cell>
        </table:table-row>
        <table:table-row table:style-name="Table5.1">
          <table:table-cell table:style-name="Table5.A3" office:value-type="string">
            <text:p text:style-name="P14"><text:span text:style-name="T17">CSDM-modellierte CMDB + Service Mapping</text:span></text:p>
          </table:table-cell>
          <table:table-cell table:style-name="Table5.A3" office:value-type="string">
            <text:p text:style-name="P14"><text:span text:style-name="T17">Bildet die dynamische Topologie zwischen technischen CIs und Business Services ab</text:span></text:p>
          </table:table-cell>
          <table:table-cell table:style-name="Table5.A3" office:value-type="string">
            <text:p text:style-name="P14"><text:span text:style-name="T17">Liefert den Geschäftskontext: welche Anwendung, welcher Business Service, welche Kritikalität hängt an einem betroffenen CI</text:span></text:p>
          </table:table-cell>
        </table:table-row>
        <table:table-row table:style-name="Table5.1">
          <table:table-cell table:style-name="Table5.A4" office:value-type="string">
            <text:p text:style-name="P14"><text:span text:style-name="T17">AIOps / Probable Root Cause Analysis</text:span></text:p>
          </table:table-cell>
          <table:table-cell table:style-name="Table5.B4" office:value-type="string">
            <text:p text:style-name="P14"><text:span text:style-name="T17">Korreliert Alerts über die Topologie hinweg, schlägt das wahrscheinlichste verursachende CI mit Konfidenzwert vor</text:span></text:p>
          </table:table-cell>
          <table:table-cell table:style-name="Table5.C4" office:value-type="string">
            <text:p text:style-name="P14"><text:span text:style-name="T17">Beschleunigt Fehleranalyse: Teams sehen die wahrscheinliche Ursache statt vieler Symptom-Alerts</text:span></text:p>
          </table:table-cell>
        </table:table-row>
      </table:table>
      <text:p text:style-name="P9"><text:span text:style-name="T8">Tabelle 5: ITOM/CSDM-Bausteine für Fehleranalyse und Kontextualisierung</text:span></text:p>
      <text:h text:style-name="Heading_20_3" text:outline-level="3">Passung zur bestehenden Toolauswahl</text:h>
      <text:p text:style-name="P13"><text:span text:style-name="T14">ServiceNow Event Management bietet zertifizierte Out-of-Box-Connectors, die auffällig genau zum bestehenden Tool-Set passen: Grafana, Prometheus (deckt den VictoriaMetrics-Stack über die kompatible API ab), SCOM, vCenter/vRealize (VMware), Azure Monitor, Amazon CloudWatch und Catchpoint. Das eröffnet eine zweite, ITOM-seitige Antwort auf die in Kapitel 6.2 offene SCOM-Integrationsfrage — zusätzlich zur Anbindung als Grafana-Datenquelle.</text:span></text:p>
      <text:h text:style-name="Heading_20_3" text:outline-level="3">Wichtige Vorbehalte</text:h>
      <text:list text:continue-numbering="true" text:style-name="WWNum2">
        <text:list-item>
          <text:p text:style-name="P2">Lizenzierung: AIOps und Probable Root Cause Analysis erfordern ITOM Health Advanced oder Enterprise — das ist nicht im Basis-ITSM enthalten, das laut Tool-Inventar (2.2) bisher genutzt wird. Der genaue Lizenzumfang ist zu verifizieren.</text:p>
        </text:list-item>
        <text:list-item>
          <text:p text:style-name="P2">CMDB-Reife: ServiceNow empfiehlt mindestens ca. 70% CMDB-Abdeckung für belastbare Korrelation; darunter greift nur eine gröbere, tag-basierte Alternative.</text:p>
        </text:list-item>
        <text:list-item>
          <text:p text:style-name="P2">CSDM (aktuell Version 5.0) ist ein lizenzkostenfreies Modellierungsframework, kein zusätzlich zu kaufendes Produkt — die Implementierung erfolgt jedoch in Phasen (Crawl → Walk → Run → Fly) und ist mit Aufwand verbunden, nicht mit einem Schalter erledigt.</text:p>
        </text:list-item>
      </text:list>
      <text:h text:style-name="Heading_20_3" text:outline-level="3">Empfehlung</text:h>
      <text:list text:continue-numbering="true" text:style-name="WWNum2">
        <text:list-item>
          <text:p text:style-name="P2">Klären, welche ITOM-Lizenzstufe aktuell vorhanden ist, bevor AIOps/Probable-RCA in die Roadmap aufgenommen wird.</text:p>
        </text:list-item>
        <text:list-item>
          <text:p text:style-name="P2">CSDM-Einführung in der Crawl-Phase beginnen (Foundation Data, grundlegende CI-zu-Anwendung-Beziehungen) parallel zu Roadmap-Phase 1 aus Kapitel 8, unabhängig von der ITOM-Lizenzentscheidung — CSDM zahlt sich auch ohne AIOps für die CMDB-Qualität aus.</text:p>
        </text:list-item>
        <text:list-item>
          <text:p text:style-name="P2">Event Management schrittweise als zusätzliche Korrelationsebene zwischen den bestehenden Monitoring-Tools und dem ServiceNow-Incident-Prozess einführen, beginnend mit den bereits zertifizierten Connectors (Grafana, SCOM, Catchpoint).</text:p>
        </text:list-item>
      </text:list>
      <text:h text:style-name="Heading_20_2" text:outline-level="2"><text:bookmark-start text:name="bm30"/>6.7 Vertiefung: Zusammenspiel der vier Monitoring-Themenfelder<text:bookmark-end text:name="bm30"/></text:h>
      <text:p text:style-name="P13"><text:span text:style-name="T14">Für die geplante Beschaffung eines Endpoint-Monitoring-Tools ist zentral, wie sich Endpoint-, Netzwerk-, Packet-Inspection- und APM-Monitoring gegenseitig ergänzen: Sie beantworten je eine Teilfrage auf dem Weg einer Nutzertransaktion vom Notebook bis zum Backend.</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Standard"><text:span text:style-name="T16">Schicht</text:span></text:p>
            </table:table-cell>
            <table:table-cell table:style-name="Table6.A1" office:value-type="string">
              <text:p text:style-name="Standard"><text:span text:style-name="T16">Beantwortet die Frage</text:span></text:p>
            </table:table-cell>
            <table:table-cell table:style-name="Table6.A1" office:value-type="string">
              <text:p text:style-name="Standard"><text:span text:style-name="T16">Wird abgedeckt durch</text:span></text:p>
            </table:table-cell>
          </table:table-row>
        </table:table-header-rows>
        <table:table-row table:style-name="Table6.1">
          <table:table-cell table:style-name="Table6.A2" office:value-type="string">
            <text:p text:style-name="P14"><text:span text:style-name="T17">Endpoint</text:span></text:p>
          </table:table-cell>
          <table:table-cell table:style-name="Table6.B2" office:value-type="string">
            <text:p text:style-name="P14"><text:span text:style-name="T17">Ist das Gerät selbst der Flaschenhals (CPU/RAM/Disk, WLAN, VPN-Client)?</text:span></text:p>
          </table:table-cell>
          <table:table-cell table:style-name="Table6.C2" office:value-type="string">
            <text:p text:style-name="P14"><text:span text:style-name="T17">Endpoint-Monitoring / DEX (noch zu beschaffen)</text:span></text:p>
          </table:table-cell>
        </table:table-row>
        <table:table-row table:style-name="Table6.1">
          <table:table-cell table:style-name="Table6.A3" office:value-type="string">
            <text:p text:style-name="P14"><text:span text:style-name="T17">Netzwerk</text:span></text:p>
          </table:table-cell>
          <table:table-cell table:style-name="Table6.A3" office:value-type="string">
            <text:p text:style-name="P14"><text:span text:style-name="T17">Ist der Pfad zwischen Gerät und Rechenzentrum/Cloud das Problem?</text:span></text:p>
          </table:table-cell>
          <table:table-cell table:style-name="Table6.A3" office:value-type="string">
            <text:p text:style-name="P14"><text:span text:style-name="T17">NNMi, Cisco ACI</text:span></text:p>
          </table:table-cell>
        </table:table-row>
        <table:table-row table:style-name="Table6.1">
          <table:table-cell table:style-name="Table6.A4" office:value-type="string">
            <text:p text:style-name="P14"><text:span text:style-name="T17">Packet Inspection</text:span></text:p>
          </table:table-cell>
          <table:table-cell table:style-name="Table6.B4" office:value-type="string">
            <text:p text:style-name="P14"><text:span text:style-name="T17">Was genau passiert im Verkehr (Paketverlust, Anomalie, Protokollebene)?</text:span></text:p>
          </table:table-cell>
          <table:table-cell table:style-name="Table6.C4" office:value-type="string">
            <text:p text:style-name="P14"><text:span text:style-name="T17">NetFlow/ETA, Zeek/Suricata (siehe Kapitel 6.5)</text:span></text:p>
          </table:table-cell>
        </table:table-row>
        <table:table-row table:style-name="Table6.1">
          <table:table-cell table:style-name="Table6.A3" office:value-type="string">
            <text:p text:style-name="P14"><text:span text:style-name="T17">APM</text:span></text:p>
          </table:table-cell>
          <table:table-cell table:style-name="Table6.A3" office:value-type="string">
            <text:p text:style-name="P14"><text:span text:style-name="T17">Ist es die Anwendung oder das Backend selbst?</text:span></text:p>
          </table:table-cell>
          <table:table-cell table:style-name="Table6.A3" office:value-type="string">
            <text:p text:style-name="P14"><text:span text:style-name="T17">Tempo, Automai</text:span></text:p>
          </table:table-cell>
        </table:table-row>
      </table:table>
      <text:p text:style-name="P9"><text:span text:style-name="T8">Tabelle 6: Diagnosekette einer Nutzertransaktion über die vier Themenfelder</text:span></text:p>
      <text:p text:style-name="P13"><text:span text:style-name="T14">Ohne alle vier Schichten gleichzeitig entsteht das klassische Verantwortungs-Pingpong („nicht mein Netz“ / „nicht meine App“ / „nicht mein Gerät“) — bei rund 200.000 Endgeräten ein erhebliches Risiko für die Mean-Time-to-Resolution. Aktuell deckt das bestehende Tool-Set drei der vier Schichten ab; Endpoint ist die einzige vollständig unbesetzte Schicht.</text:span></text:p>
      <text:h text:style-name="Heading_20_3" text:outline-level="3"><text:soft-page-break/>Technische Verknüpfung: gemeinsamer Korrelationsschlüssel</text:h>
      <text:p text:style-name="P13"><text:span text:style-name="T14">Damit sich die vier Schichten gegenseitig ergänzen statt nur nebeneinander zu existieren, ist ein gemeinsamer Korrelationsschlüssel (Zeitstempel plus Geräte-/Nutzer-ID) über die gesamte Kette erforderlich. Ist das Notebook als Configuration Item in der CSDM-modellierten CMDB hinterlegt (Kapitel 6.6), kann ServiceNow ITOM Event Management eine Störung potenziell über alle vier Schichten hinweg korrelieren statt nur isoliert pro Tool zu alarmieren.</text:span></text:p>
      <text:h text:style-name="Heading_20_3" text:outline-level="3">Compliance-Hinweis</text:h>
      <text:p text:style-name="P13"><text:span text:style-name="T14">Ein Endpoint-Monitoring-Agent läuft auf einem konkreten, einer Person zuordenbaren Gerät — das ist mindestens ebenso eindeutig ein Fall für § 80 Abs. 1 Nr. 21 BPersVG wie die in Kapitel 6.5 behandelte Netzwerk-Verkehrsanalyse. Die Personalrats-Beteiligung sollte von Beginn an Teil des Beschaffungsprozesses sein, nicht nachgelagert erfolgen.</text:span></text:p>
      <text:h text:style-name="Heading_20_3" text:outline-level="3">Marktüberblick Endpoint-Monitoring / DEX (Stand 2026)</text:h>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Standard"><text:span text:style-name="T16">Produkt</text:span></text:p>
            </table:table-cell>
            <table:table-cell table:style-name="Table7.A1" office:value-type="string">
              <text:p text:style-name="Standard"><text:span text:style-name="T16">Stärke</text:span></text:p>
            </table:table-cell>
            <table:table-cell table:style-name="Table7.A1" office:value-type="string">
              <text:p text:style-name="Standard"><text:span text:style-name="T16">Passung zur Landschaft</text:span></text:p>
            </table:table-cell>
          </table:table-row>
        </table:table-header-rows>
        <table:table-row table:style-name="Table7.1">
          <table:table-cell table:style-name="Table7.A2" office:value-type="string">
            <text:p text:style-name="P14"><text:span text:style-name="T17">Nexthink</text:span></text:p>
          </table:table-cell>
          <table:table-cell table:style-name="Table7.B2" office:value-type="string">
            <text:p text:style-name="P14"><text:span text:style-name="T17">Marktführer im physischen Geräte-Fleet-Bereich, Sentiment-Erfassung, automatisierte Remediation</text:span></text:p>
          </table:table-cell>
          <table:table-cell table:style-name="Table7.C2" office:value-type="string">
            <text:p text:style-name="P14"><text:span text:style-name="T17">Geeignet für große, überwiegend physische Notebook-Flotten</text:span></text:p>
          </table:table-cell>
        </table:table-row>
        <table:table-row table:style-name="Table7.1">
          <table:table-cell table:style-name="Table7.A3" office:value-type="string">
            <text:p text:style-name="P14"><text:span text:style-name="T17">Lakeside SysTrack</text:span></text:p>
          </table:table-cell>
          <table:table-cell table:style-name="Table7.A3" office:value-type="string">
            <text:p text:style-name="P14"><text:span text:style-name="T17">Sehr hohe Telemetrie-Dichte, lange historische Datenhaltung</text:span></text:p>
          </table:table-cell>
          <table:table-cell table:style-name="Table7.A3" office:value-type="string">
            <text:p text:style-name="P14"><text:span text:style-name="T17">Alternative zu Nexthink für große Flotten, ähnliches Einsatzprofil</text:span></text:p>
          </table:table-cell>
        </table:table-row>
        <table:table-row table:style-name="Table7.1">
          <table:table-cell table:style-name="Table7.A4" office:value-type="string">
            <text:p text:style-name="P14"><text:span text:style-name="T17">ControlUp</text:span></text:p>
          </table:table-cell>
          <table:table-cell table:style-name="Table7.B4" office:value-type="string">
            <text:p text:style-name="P14"><text:span text:style-name="T17">Wurzeln in Citrix-/VDI-Monitoring, inzwischen auch physische Endpoints</text:span></text:p>
          </table:table-cell>
          <table:table-cell table:style-name="Table7.C4" office:value-type="string">
            <text:p text:style-name="P14"><text:span text:style-name="T17">Potenziell passend zur Citrix-Spur, die sich bereits aus dem Automai-Einsatz ergibt</text:span></text:p>
          </table:table-cell>
        </table:table-row>
        <table:table-row table:style-name="Table7.1">
          <table:table-cell table:style-name="Table7.A3" office:value-type="string">
            <text:p text:style-name="P14"><text:span text:style-name="T17">Microsoft Intune + Endpoint Analytics</text:span></text:p>
          </table:table-cell>
          <table:table-cell table:style-name="Table7.A3" office:value-type="string">
            <text:p text:style-name="P14"><text:span text:style-name="T17">Microsoft-natives Bordmittel, ggf. bereits anteilig lizenziert</text:span></text:p>
          </table:table-cell>
          <table:table-cell table:style-name="Table7.A3" office:value-type="string">
            <text:p text:style-name="P14"><text:span text:style-name="T17">Kosteneffizienteste Option im bestehenden AD-/Microsoft-Ökosystem, funktional schmaler als die Spezialisten</text:span></text:p>
          </table:table-cell>
        </table:table-row>
      </table:table>
      <text:p text:style-name="P9"><text:span text:style-name="T8">Tabelle 7: Marktüberblick Endpoint-Monitoring/DEX</text:span></text:p>
      <text:h text:style-name="Heading_20_3" text:outline-level="3">Empfehlung</text:h>
      <text:list text:continue-numbering="true" text:style-name="WWNum2">
        <text:list-item>
          <text:p text:style-name="P2">Personalrats-Beteiligung gemäß § 80 Abs. 1 Nr. 21 BPersVG von Beginn des Beschaffungsprozesses an einplanen, nicht erst nach Produktauswahl.</text:p>
        </text:list-item>
        <text:list-item>
          <text:p text:style-name="P2">Vor der Toolauswahl klären, ob der Schwerpunkt auf physischen Notebooks (Nexthink/Lakeside), auf Citrix/VDI (ControlUp) oder auf Kosteneffizienz im Microsoft-Ökosystem (Intune/Endpoint Analytics) liegen soll.</text:p>
        </text:list-item>
        <text:list-item>
          <text:p text:style-name="P2">Von Anfang an auf Integrationsfähigkeit mit Grafana und ServiceNow ITOM/CSDM achten, damit die vier Diagnoseschichten tatsächlich korrelierbar werden und nicht als fünftes isoliertes Tool enden.</text:p>
        </text:list-item>
      </text:list>
      <text:h text:style-name="Heading_20_1" text:outline-level="1"><text:bookmark-start text:name="bm31"/>7. Anforderungskatalog<text:bookmark-end text:name="bm31"/></text:h>
      <text:h text:style-name="Heading_20_2" text:outline-level="2"><text:bookmark-start text:name="bm32"/>7.1 Funktionale Anforderungen<text:bookmark-end text:name="bm32"/></text:h>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Standard"><text:span text:style-name="T16">ID</text:span></text:p>
            </table:table-cell>
            <table:table-cell table:style-name="Table8.A1" office:value-type="string">
              <text:p text:style-name="Standard"><text:span text:style-name="T16">Domäne</text:span></text:p>
            </table:table-cell>
            <table:table-cell table:style-name="Table8.A1" office:value-type="string">
              <text:p text:style-name="Standard"><text:span text:style-name="T16">Anforderung</text:span></text:p>
            </table:table-cell>
            <table:table-cell table:style-name="Table8.A1" office:value-type="string">
              <text:p text:style-name="Standard"><text:span text:style-name="T16">Priorität</text:span></text:p>
            </table:table-cell>
          </table:table-row>
        </table:table-header-rows>
        <table:table-row table:style-name="Table8.1">
          <table:table-cell table:style-name="Table8.A2" office:value-type="string">
            <text:p text:style-name="P14"><text:span text:style-name="T17">F-01</text:span></text:p>
          </table:table-cell>
          <table:table-cell table:style-name="Table8.B2" office:value-type="string">
            <text:p text:style-name="P14"><text:span text:style-name="T17">Infrastruktur</text:span></text:p>
          </table:table-cell>
          <table:table-cell table:style-name="Table8.C2" office:value-type="string">
            <text:p text:style-name="P14"><text:span text:style-name="T17">Erfassung von Verfügbarkeit und Auslastung (CPU/RAM/Storage) für alle rund 20.000 Server (Linux und Windows)</text:span></text:p>
          </table:table-cell>
          <table:table-cell table:style-name="Table8.D2" office:value-type="string">
            <text:p text:style-name="P14"><text:span text:style-name="T17">Muss</text:span></text:p>
          </table:table-cell>
        </table:table-row>
        <table:table-row table:style-name="Table8.1">
          <table:table-cell table:style-name="Table8.A3" office:value-type="string">
            <text:p text:style-name="P14"><text:span text:style-name="T17">F-02</text:span></text:p>
          </table:table-cell>
          <table:table-cell table:style-name="Table8.A3" office:value-type="string">
            <text:p text:style-name="P14"><text:span text:style-name="T17">Infrastruktur</text:span></text:p>
          </table:table-cell>
          <table:table-cell table:style-name="Table8.A3" office:value-type="string">
            <text:p text:style-name="P14"><text:span text:style-name="T17">Topologie- und Statusüberwachung des Netzwerks (Cisco ACI, NNMi) inkl. VPN-Kapazität für mobile Endgeräte</text:span></text:p>
          </table:table-cell>
          <table:table-cell table:style-name="Table8.A3" office:value-type="string">
            <text:p text:style-name="P14"><text:span text:style-name="T17">Muss</text:span></text:p>
          </table:table-cell>
        </table:table-row>
        <table:table-row table:style-name="Table8.1">
          <table:table-cell table:style-name="Table8.A4" office:value-type="string">
            <text:p text:style-name="P14"><text:span text:style-name="T17">F-03</text:span></text:p>
          </table:table-cell>
          <table:table-cell table:style-name="Table8.B4" office:value-type="string">
            <text:p text:style-name="P14"><text:span text:style-name="T17">Infrastruktur</text:span></text:p>
          </table:table-cell>
          <table:table-cell table:style-name="Table8.C4" office:value-type="string">
            <text:p text:style-name="P14"><text:span text:style-name="T17">Einheitliches Tagging-Schema (Standort, Anwendung, Kritikalität) über SCOM und VictoriaMetrics hinweg</text:span></text:p>
          </table:table-cell>
          <table:table-cell table:style-name="Table8.D4" office:value-type="string">
            <text:p text:style-name="P14"><text:span text:style-name="T17">Soll</text:span></text:p>
          </table:table-cell>
        </table:table-row>
        <table:table-row table:style-name="Table8.1">
          <table:table-cell table:style-name="Table8.A3" office:value-type="string">
            <text:p text:style-name="P14"><text:span text:style-name="T17">F-04</text:span></text:p>
          </table:table-cell>
          <table:table-cell table:style-name="Table8.A3" office:value-type="string">
            <text:p text:style-name="P14"><text:span text:style-name="T17">APM</text:span></text:p>
          </table:table-cell>
          <table:table-cell table:style-name="Table8.A3" office:value-type="string">
            <text:p text:style-name="P14"><text:span text:style-name="T17">Verteiltes Tracing für Fachanwendungen mit Korrelation zu Logs und Metriken über eine gemeinsame Trace-ID</text:span></text:p>
          </table:table-cell>
          <table:table-cell table:style-name="Table8.A3" office:value-type="string">
            <text:p text:style-name="P14"><text:span text:style-name="T17">Muss</text:span></text:p>
          </table:table-cell>
        </table:table-row>
        <text:soft-page-break/>
        <table:table-row table:style-name="Table8.1">
          <table:table-cell table:style-name="Table8.A6" office:value-type="string">
            <text:p text:style-name="P14"><text:span text:style-name="T17">F-05</text:span></text:p>
          </table:table-cell>
          <table:table-cell table:style-name="Table8.B6" office:value-type="string">
            <text:p text:style-name="P14"><text:span text:style-name="T17">APM</text:span></text:p>
          </table:table-cell>
          <table:table-cell table:style-name="Table8.C6" office:value-type="string">
            <text:p text:style-name="P14"><text:span text:style-name="T17">Einheitlicher Instrumentierungsstandard (empfohlen: OpenTelemetry) für neue Fachanwendungen</text:span></text:p>
          </table:table-cell>
          <table:table-cell table:style-name="Table8.D6" office:value-type="string">
            <text:p text:style-name="P14"><text:span text:style-name="T17">Soll</text:span></text:p>
          </table:table-cell>
        </table:table-row>
        <table:table-row table:style-name="Table8.1">
          <table:table-cell table:style-name="Table8.A3" office:value-type="string">
            <text:p text:style-name="P14"><text:span text:style-name="T17">F-06</text:span></text:p>
          </table:table-cell>
          <table:table-cell table:style-name="Table8.A3" office:value-type="string">
            <text:p text:style-name="P14"><text:span text:style-name="T17">APM</text:span></text:p>
          </table:table-cell>
          <table:table-cell table:style-name="Table8.A3" office:value-type="string">
            <text:p text:style-name="P14"><text:span text:style-name="T17">Priorisierte Einführung nach fachlicher Kritikalität der 100 Fachanwendungen</text:span></text:p>
          </table:table-cell>
          <table:table-cell table:style-name="Table8.A3" office:value-type="string">
            <text:p text:style-name="P14"><text:span text:style-name="T17">Soll</text:span></text:p>
          </table:table-cell>
        </table:table-row>
        <table:table-row table:style-name="Table8.1">
          <table:table-cell table:style-name="Table8.A8" office:value-type="string">
            <text:p text:style-name="P14"><text:span text:style-name="T17">F-07</text:span></text:p>
          </table:table-cell>
          <table:table-cell table:style-name="Table8.B8" office:value-type="string">
            <text:p text:style-name="P14"><text:span text:style-name="T17">Security</text:span></text:p>
          </table:table-cell>
          <table:table-cell table:style-name="Table8.C8" office:value-type="string">
            <text:p text:style-name="P14"><text:span text:style-name="T17">Revisionssichere, unveränderliche Protokollierung von Zugriffen auf Sozialdaten</text:span></text:p>
          </table:table-cell>
          <table:table-cell table:style-name="Table8.D8" office:value-type="string">
            <text:p text:style-name="P14"><text:span text:style-name="T17">Muss</text:span></text:p>
          </table:table-cell>
        </table:table-row>
        <table:table-row table:style-name="Table8.1">
          <table:table-cell table:style-name="Table8.A3" office:value-type="string">
            <text:p text:style-name="P14"><text:span text:style-name="T17">F-08</text:span></text:p>
          </table:table-cell>
          <table:table-cell table:style-name="Table8.A3" office:value-type="string">
            <text:p text:style-name="P14"><text:span text:style-name="T17">Security</text:span></text:p>
          </table:table-cell>
          <table:table-cell table:style-name="Table8.A3" office:value-type="string">
            <text:p text:style-name="P14"><text:span text:style-name="T17">Vollständige Anbindung aller relevanten Log-/Event-Quellen an das bestehende SIEM, inkl. Korrelation und Anomalieerkennung</text:span></text:p>
          </table:table-cell>
          <table:table-cell table:style-name="Table8.A3" office:value-type="string">
            <text:p text:style-name="P14"><text:span text:style-name="T17">Muss</text:span></text:p>
          </table:table-cell>
        </table:table-row>
        <text:soft-page-break/>
        <table:table-row table:style-name="Table8.1">
          <table:table-cell table:style-name="Table8.A10" office:value-type="string">
            <text:p text:style-name="P14"><text:span text:style-name="T17">F-09</text:span></text:p>
          </table:table-cell>
          <table:table-cell table:style-name="Table8.B10" office:value-type="string">
            <text:p text:style-name="P14"><text:span text:style-name="T17">Security</text:span></text:p>
          </table:table-cell>
          <table:table-cell table:style-name="Table8.C10" office:value-type="string">
            <text:p text:style-name="P14"><text:span text:style-name="T17">Rollenbasierte, strikt getrennte Zugriffsrechte auf Security- und Audit-Daten</text:span></text:p>
          </table:table-cell>
          <table:table-cell table:style-name="Table8.D10" office:value-type="string">
            <text:p text:style-name="P14"><text:span text:style-name="T17">Muss</text:span></text:p>
          </table:table-cell>
        </table:table-row>
        <table:table-row table:style-name="Table8.1">
          <table:table-cell table:style-name="Table8.A3" office:value-type="string">
            <text:p text:style-name="P14"><text:span text:style-name="T17">F-10</text:span></text:p>
          </table:table-cell>
          <table:table-cell table:style-name="Table8.A3" office:value-type="string">
            <text:p text:style-name="P14"><text:span text:style-name="T17">Business / KPI</text:span></text:p>
          </table:table-cell>
          <table:table-cell table:style-name="Table8.A3" office:value-type="string">
            <text:p text:style-name="P14"><text:span text:style-name="T17">Synthetisches Monitoring und Real User Monitoring des Online-Angebots (bereits via CatchPoint)</text:span></text:p>
          </table:table-cell>
          <table:table-cell table:style-name="Table8.A3" office:value-type="string">
            <text:p text:style-name="P14"><text:span text:style-name="T17">Muss</text:span></text:p>
          </table:table-cell>
        </table:table-row>
        <table:table-row table:style-name="Table8.1">
          <table:table-cell table:style-name="Table8.A12" office:value-type="string">
            <text:p text:style-name="P14"><text:span text:style-name="T17">F-11</text:span></text:p>
          </table:table-cell>
          <table:table-cell table:style-name="Table8.B12" office:value-type="string">
            <text:p text:style-name="P14"><text:span text:style-name="T17">Business / KPI</text:span></text:p>
          </table:table-cell>
          <table:table-cell table:style-name="Table8.C12" office:value-type="string">
            <text:p text:style-name="P14"><text:span text:style-name="T17">Definition und Visualisierung fachlicher KPIs/SLOs gemeinsam mit den Fachbereichen</text:span></text:p>
          </table:table-cell>
          <table:table-cell table:style-name="Table8.D12" office:value-type="string">
            <text:p text:style-name="P14"><text:span text:style-name="T17">Soll</text:span></text:p>
          </table:table-cell>
        </table:table-row>
        <table:table-row table:style-name="Table8.1">
          <table:table-cell table:style-name="Table8.A3" office:value-type="string">
            <text:p text:style-name="P14"><text:span text:style-name="T17">F-12</text:span></text:p>
          </table:table-cell>
          <table:table-cell table:style-name="Table8.A3" office:value-type="string">
            <text:p text:style-name="P14"><text:span text:style-name="T17">Übergreifend</text:span></text:p>
          </table:table-cell>
          <table:table-cell table:style-name="Table8.A3" office:value-type="string">
            <text:p text:style-name="P14"><text:span text:style-name="T17">Zentrales Cockpit (Grafana) mit Datenanbindung aller vier Domänen</text:span></text:p>
          </table:table-cell>
          <table:table-cell table:style-name="Table8.A3" office:value-type="string">
            <text:p text:style-name="P14"><text:span text:style-name="T17">Muss</text:span></text:p>
          </table:table-cell>
        </table:table-row>
        <text:soft-page-break/>
        <table:table-row table:style-name="Table8.1">
          <table:table-cell table:style-name="Table8.A14" office:value-type="string">
            <text:p text:style-name="P14"><text:span text:style-name="T17">F-13</text:span></text:p>
          </table:table-cell>
          <table:table-cell table:style-name="Table8.B14" office:value-type="string">
            <text:p text:style-name="P14"><text:span text:style-name="T17">Übergreifend</text:span></text:p>
          </table:table-cell>
          <table:table-cell table:style-name="Table8.C14" office:value-type="string">
            <text:p text:style-name="P14"><text:span text:style-name="T17">Einheitliches Schweregrad- und Eskalationsschema mit Anbindung an ServiceNow</text:span></text:p>
          </table:table-cell>
          <table:table-cell table:style-name="Table8.D14" office:value-type="string">
            <text:p text:style-name="P14"><text:span text:style-name="T17">Muss</text:span></text:p>
          </table:table-cell>
        </table:table-row>
        <table:table-row table:style-name="Table8.1">
          <table:table-cell table:style-name="Table8.A3" office:value-type="string">
            <text:p text:style-name="P14"><text:span text:style-name="T17">F-14</text:span></text:p>
          </table:table-cell>
          <table:table-cell table:style-name="Table8.A3" office:value-type="string">
            <text:p text:style-name="P14"><text:span text:style-name="T17">Security</text:span></text:p>
          </table:table-cell>
          <table:table-cell table:style-name="Table8.A3" office:value-type="string">
            <text:p text:style-name="P14"><text:span text:style-name="T17">Definierte und dokumentierte Eskalationskette zwischen SIEM, CERT und dem ServiceNow-Incident-Prozess</text:span></text:p>
          </table:table-cell>
          <table:table-cell table:style-name="Table8.A3" office:value-type="string">
            <text:p text:style-name="P14"><text:span text:style-name="T17">Muss</text:span></text:p>
          </table:table-cell>
        </table:table-row>
      </table:table>
      <text:p text:style-name="P9"><text:span text:style-name="T8">Tabelle 8: Funktionale Anforderungen je Domäne (Entwurf, zur Priorisierung im Dialog)</text:span></text:p>
      <text:h text:style-name="Heading_20_2" text:outline-level="2"><text:bookmark-start text:name="bm33"/>7.2 Nicht-funktionale Anforderungen<text:bookmark-end text:name="bm33"/></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Standard"><text:span text:style-name="T16">ID</text:span></text:p>
            </table:table-cell>
            <table:table-cell table:style-name="Table9.A1" office:value-type="string">
              <text:p text:style-name="Standard"><text:span text:style-name="T16">Kategorie</text:span></text:p>
            </table:table-cell>
            <table:table-cell table:style-name="Table9.A1" office:value-type="string">
              <text:p text:style-name="Standard"><text:span text:style-name="T16">Anforderung</text:span></text:p>
            </table:table-cell>
          </table:table-row>
        </table:table-header-rows>
        <table:table-row table:style-name="Table9.1">
          <table:table-cell table:style-name="Table9.A2" office:value-type="string">
            <text:p text:style-name="P14"><text:span text:style-name="T17">N-01</text:span></text:p>
          </table:table-cell>
          <table:table-cell table:style-name="Table9.B2" office:value-type="string">
            <text:p text:style-name="P14"><text:span text:style-name="T17">Verfügbarkeit</text:span></text:p>
          </table:table-cell>
          <table:table-cell table:style-name="Table9.C2" office:value-type="string">
            <text:p text:style-name="P14"><text:span text:style-name="T17">Die zentrale Beobachtungsplattform selbst muss hochverfügbar ausgelegt sein (kein Single Point of Failure im Monitoring)</text:span></text:p>
          </table:table-cell>
        </table:table-row>
        <table:table-row table:style-name="Table9.1">
          <table:table-cell table:style-name="Table9.A3" office:value-type="string">
            <text:p text:style-name="P14"><text:span text:style-name="T17">N-02</text:span></text:p>
          </table:table-cell>
          <table:table-cell table:style-name="Table9.A3" office:value-type="string">
            <text:p text:style-name="P14"><text:span text:style-name="T17">Performance</text:span></text:p>
          </table:table-cell>
          <table:table-cell table:style-name="Table9.A3" office:value-type="string">
            <text:p text:style-name="P14"><text:span text:style-name="T17">Dashboards müssen auch bei 20.000 überwachten Servern und hoher Metrik-Kardinalität performant bleiben</text:span></text:p>
          </table:table-cell>
        </table:table-row>
        <table:table-row table:style-name="Table9.1">
          <table:table-cell table:style-name="Table9.A4" office:value-type="string">
            <text:p text:style-name="P14"><text:span text:style-name="T17">N-03</text:span></text:p>
          </table:table-cell>
          <table:table-cell table:style-name="Table9.B4" office:value-type="string">
            <text:p text:style-name="P14"><text:span text:style-name="T17">Skalierbarkeit</text:span></text:p>
          </table:table-cell>
          <table:table-cell table:style-name="Table9.C4" office:value-type="string">
            <text:p text:style-name="P14"><text:span text:style-name="T17">Storage- und Indexstrategie (Retention-Tiering, Sharding) muss auf Basis von ca. 10 TB Log-Volumen/Tag (≈ 300 TB bei 30 Tagen Aufbewahrung) sowie mit wachsender Zahl an Fachanwendungen und Endgeräten dimensioniert sein und mitwachsen</text:span></text:p>
          </table:table-cell>
        </table:table-row>
        <table:table-row table:style-name="Table9.1">
          <table:table-cell table:style-name="Table9.A3" office:value-type="string">
            <text:p text:style-name="P14"><text:span text:style-name="T17">N-04</text:span></text:p>
          </table:table-cell>
          <table:table-cell table:style-name="Table9.A3" office:value-type="string">
            <text:p text:style-name="P14"><text:span text:style-name="T17">Compliance</text:span></text:p>
          </table:table-cell>
          <table:table-cell table:style-name="Table9.A3" office:value-type="string">
            <text:p text:style-name="P14"><text:span text:style-name="T17">Einhaltung von Sozialgeheimnis (SGB I/SGB X), DSGVO (insb. Art. 9, Art. 32) und BSI IT-Grundschutz bei Erfassung, Speicherung und Zugriff auf Monitoring-Daten</text:span></text:p>
          </table:table-cell>
        </table:table-row>
        <table:table-row table:style-name="Table9.1">
          <table:table-cell table:style-name="Table9.A6" office:value-type="string">
            <text:p text:style-name="P14"><text:span text:style-name="T17">N-05</text:span></text:p>
          </table:table-cell>
          <table:table-cell table:style-name="Table9.B6" office:value-type="string">
            <text:p text:style-name="P14"><text:span text:style-name="T17">Datenresidenz</text:span></text:p>
          </table:table-cell>
          <table:table-cell table:style-name="Table9.C6" office:value-type="string">
            <text:p text:style-name="P14"><text:span text:style-name="T17">Beachtung von Anforderungen an Standort und Souveränität bei Daten mit Sozialdatenbezug, insbesondere bei den Cloud-Anteilen in AWS und Azure; StackIT als souveräne Option ist hierfür von besonderem Interesse</text:span></text:p>
          </table:table-cell>
        </table:table-row>
        <table:table-row table:style-name="Table9.1">
          <table:table-cell table:style-name="Table9.A3" office:value-type="string">
            <text:p text:style-name="P14"><text:span text:style-name="T17">N-06</text:span></text:p>
          </table:table-cell>
          <table:table-cell table:style-name="Table9.A3" office:value-type="string">
            <text:p text:style-name="P14"><text:span text:style-name="T17">Auditierbarkeit</text:span></text:p>
          </table:table-cell>
          <table:table-cell table:style-name="Table9.A3" office:value-type="string">
            <text:p text:style-name="P14"><text:span text:style-name="T17">Lückenlose, manipulationssichere Nachvollziehbarkeit von Zugriffen auf Monitoring- und Log-Daten</text:span></text:p>
          </table:table-cell>
        </table:table-row>
        <table:table-row table:style-name="Table9.1">
          <table:table-cell table:style-name="Table9.A8" office:value-type="string">
            <text:p text:style-name="P14"><text:span text:style-name="T17">N-07</text:span></text:p>
          </table:table-cell>
          <table:table-cell table:style-name="Table9.B8" office:value-type="string">
            <text:p text:style-name="P14"><text:span text:style-name="T17">Betriebsaufwand</text:span></text:p>
          </table:table-cell>
          <table:table-cell table:style-name="Table9.C8" office:value-type="string">
            <text:p text:style-name="P14"><text:span text:style-name="T17">Konsolidierung redundanter Werkzeuge zur Reduktion von Betriebsaufwand und Lizenzkosten</text:span></text:p>
          </table:table-cell>
        </table:table-row>
      </table:table>
      <text:p text:style-name="P9"><text:span text:style-name="T8">Tabelle 9: Nicht-funktionale Anforderungen</text:span></text:p>
      <text:h text:style-name="Heading_20_1" text:outline-level="1"><text:bookmark-start text:name="bm34"/>8. Roadmap / Migrationspfad<text:bookmark-end text:name="bm34"/></text:h>
      <text:p text:style-name="P13"><text:span text:style-name="T14">Die folgende Phasenplanung ist ein erster Vorschlag und versteht sich als Diskussionsgrundlage für die konkrete zeitliche und ressourcenseitige Planung.</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Standard"><text:span text:style-name="T16">Phase</text:span></text:p>
            </table:table-cell>
            <table:table-cell table:style-name="Table10.A1" office:value-type="string">
              <text:p text:style-name="Standard"><text:span text:style-name="T16">Inhalt</text:span></text:p>
            </table:table-cell>
            <table:table-cell table:style-name="Table10.A1" office:value-type="string">
              <text:p text:style-name="Standard"><text:span text:style-name="T16">Ergebnis / Meilenstein</text:span></text:p>
            </table:table-cell>
          </table:table-row>
        </table:table-header-rows>
        <table:table-row table:style-name="Table10.1">
          <table:table-cell table:style-name="Table10.A2" office:value-type="string">
            <text:p text:style-name="P14"><text:span text:style-name="T17">Phase 0 – Klärung &amp; Entscheidung (ca. 1–2 Monate)</text:span></text:p>
          </table:table-cell>
          <table:table-cell table:style-name="Table10.B2" office:value-type="string">
            <text:p text:style-name="P14"><text:span text:style-name="T17">Workshops zu den offenen Entscheidungsfragen aus Kapitel 6.2 (Log-Konsolidierung, SIEM-Integration, Cloud-Integration, Automai-Integration); Verifizierung des Ist-Zustands mit den Betriebsteams</text:span></text:p>
          </table:table-cell>
          <table:table-cell table:style-name="Table10.C2" office:value-type="string">
            <text:p text:style-name="P14"><text:span text:style-name="T17">Verbindliches Zielbild, priorisierte Roadmap</text:span></text:p>
          </table:table-cell>
        </table:table-row>
        <table:table-row table:style-name="Table10.1">
          <table:table-cell table:style-name="Table10.A3" office:value-type="string">
            <text:p text:style-name="P14"><text:span text:style-name="T17">Phase 1 – Quick Wins (ca. 2–4 Monate)</text:span></text:p>
          </table:table-cell>
          <table:table-cell table:style-name="Table10.A3" office:value-type="string">
            <text:p text:style-name="P14"><text:span text:style-name="T17">Einheitliches Tagging-Schema einführen; SCOM als Grafana-Datenquelle anbinden; erste gemeinsame Dashboards über Domänengrenzen hinweg</text:span></text:p>
          </table:table-cell>
          <table:table-cell table:style-name="Table10.A3" office:value-type="string">
            <text:p text:style-name="P14"><text:span text:style-name="T17">Verbesserte Ende-zu-Ende-Sicht ohne große Systemumbauten</text:span></text:p>
          </table:table-cell>
        </table:table-row>
        <table:table-row table:style-name="Table10.1">
          <table:table-cell table:style-name="Table10.A4" office:value-type="string">
            <text:p text:style-name="P14"><text:span text:style-name="T17">Phase 2 – Konsolidierung &amp; Integration (ca. 4–8 Monate)</text:span></text:p>
          </table:table-cell>
          <table:table-cell table:style-name="Table10.B4" office:value-type="string">
            <text:p text:style-name="P14"><text:span text:style-name="T17">Log-Landschaft konsolidieren bzw. Zuständigkeiten klar abgrenzen; Cloud-Monitoring-Integration für AWS, Azure und StackIT umsetzen</text:span></text:p>
          </table:table-cell>
          <table:table-cell table:style-name="Table10.C4" office:value-type="string">
            <text:p text:style-name="P14"><text:span text:style-name="T17">Reduzierte Tool-Fragmentierung, durchgängige Hybrid-Cloud-Sicht</text:span></text:p>
          </table:table-cell>
        </table:table-row>
        <table:table-row table:style-name="Table10.1">
          <table:table-cell table:style-name="Table10.A3" office:value-type="string">
            <text:p text:style-name="P14"><text:span text:style-name="T17">Phase 3 – Security &amp; Compliance-Ausbau (ca. 6–10 Monate)</text:span></text:p>
          </table:table-cell>
          <table:table-cell table:style-name="Table10.A3" office:value-type="string">
            <text:p text:style-name="P14"><text:span text:style-name="T17">SIEM-Anbindung vervollständigen (fehlende Log-/Event-Quellen integrieren) und Zusammenspiel mit dem CERT formalisieren; Audit-Logging für Sozialdaten gemäß Compliance-Anforderungen härten</text:span></text:p>
          </table:table-cell>
          <table:table-cell table:style-name="Table10.A3" office:value-type="string">
            <text:p text:style-name="P14"><text:span text:style-name="T17">Nachweisbare Compliance, verbesserte Threat Detection</text:span></text:p>
          </table:table-cell>
        </table:table-row>
        <table:table-row table:style-name="Table10.1">
          <table:table-cell table:style-name="Table10.A6" office:value-type="string">
            <text:p text:style-name="P14"><text:span text:style-name="T17">Phase 4 – Optimierung &amp; Automatisierung (laufend)</text:span></text:p>
          </table:table-cell>
          <table:table-cell table:style-name="Table10.B6" office:value-type="string">
            <text:p text:style-name="P14"><text:span text:style-name="T17">OpenTelemetry als Instrumentierungsstandard für neue Fachanwendungen verbindlich machen; Automai-Abdeckung für nicht instrumentierbare Fachanwendungen konsolidieren und in das zentrale Cockpit integrieren</text:span></text:p>
          </table:table-cell>
          <table:table-cell table:style-name="Table10.C6" office:value-type="string">
            <text:p text:style-name="P14"><text:span text:style-name="T17">Reduzierte Mean-Time-to-Resolution, geringerer manueller Aufwand</text:span></text:p>
          </table:table-cell>
        </table:table-row>
      </table:table>
      <text:p text:style-name="P9"><text:span text:style-name="T8">Tabelle 10: Vorgeschlagene Roadmap-Phasen</text:span></text:p>
      <text:h text:style-name="Heading_20_1" text:outline-level="1"><text:bookmark-start text:name="bm35"/><text:soft-page-break/>9. Offene Punkte, Risiken und nächste Schritte<text:bookmark-end text:name="bm35"/></text:h>
      <text:h text:style-name="Heading_20_2" text:outline-level="2"><text:bookmark-start text:name="bm36"/>9.1 Offene Punkte für den weiteren Dialog<text:bookmark-end text:name="bm36"/></text:h>
      <text:list text:continue-numbering="true" text:style-name="WWNum2">
        <text:list-item>
          <text:p text:style-name="P2">Welche Log- und Event-Quellen sind noch nicht an das bestehende SIEM angebunden, und wie wird die Lückenschließung priorisiert?</text:p>
        </text:list-item>
        <text:list-item>
          <text:p text:style-name="P2">Wie ist die Aufgabenteilung zwischen CERT und dem allgemeinen ServiceNow-Incident-Prozess geregelt?</text:p>
        </text:list-item>
        <text:list-item>
          <text:p text:style-name="P2">Wie genau sollen AWS, Azure und StackIT an die zentrale Beobachtungsplattform angebunden werden?</text:p>
        </text:list-item>
        <text:list-item>
          <text:p text:style-name="P2">Wer übernimmt die Verantwortung und Entscheidung für die in Kapitel 6.4 empfohlene Konsolidierung von Elasticsearch in OpenSearch?</text:p>
        </text:list-item>
        <text:list-item>
          <text:p text:style-name="P2">Reichen 30 Tage Aufbewahrung für sicherheits- und auditrelevante Zugriffe auf Sozialdaten aus, oder sind hierfür rechtlich längere Fristen erforderlich? (mit Rechts-/Datenschutzabteilung zu verifizieren)</text:p>
        </text:list-item>
        <text:list-item>
          <text:p text:style-name="P2">Welche fachlichen KPIs/SLOs sind gemeinsam mit den Fachbereichen zu definieren?</text:p>
        </text:list-item>
        <text:list-item>
          <text:p text:style-name="P2">Wie werden die Automai-Testergebnisse technisch in das zentrale Cockpit (Grafana) integriert, und welche Fachanwendungen werden aktuell bereits abgedeckt?</text:p>
        </text:list-item>
        <text:list-item>
          <text:p text:style-name="P2">Welcher Datenschutz-Freigabeprozess ist für Änderungen an der Log- und Monitoring-Architektur vorgesehen, soweit Sozialdaten betroffen sein können?</text:p>
        </text:list-item>
        <text:list-item>
          <text:p text:style-name="P2">Ab welcher Ausbaustufe der Netzwerk-Verkehrsanalyse (Kapitel 6.5) ist der Personalrat gemäß § 80 Abs. 1 Nr. 21 BPersVG zu beteiligen, und wann sollte dieser Prozess angestoßen werden?</text:p>
        </text:list-item>
        <text:list-item>
          <text:p text:style-name="P2">Welche ServiceNow-ITOM-Lizenzstufe ist vorhanden, und wie hoch ist die aktuelle CMDB-Abdeckung? Davon hängt ab, wie schnell Event Management und AIOps gemäß Kapitel 6.6 nutzbar sind.</text:p>
        </text:list-item>
        <text:list-item>
          <text:p text:style-name="P2">Welches Endpoint-Monitoring-/DEX-Tool wird beschafft, und wann wird der Personalrat gemäß § 80 Abs. 1 Nr. 21 BPersVG in den Beschaffungsprozess eingebunden (siehe Kapitel 6.7)?</text:p>
        </text:list-item>
      </text:list>
      <text:h text:style-name="Heading_20_2" text:outline-level="2"><text:bookmark-start text:name="bm37"/>9.2 Risiken<text:bookmark-end text:name="bm37"/></text:h>
      <text:list text:continue-numbering="true" text:style-name="WWNum2">
        <text:list-item>
          <text:p text:style-name="P2">Fortgesetzte Tool-Fragmentierung erhöht Betriebsaufwand und Kosten.</text:p>
        </text:list-item>
        <text:list-item>
          <text:p text:style-name="P2">Compliance-Lücken, falls einzelne Log-/Event-Quellen nicht an das bestehende SIEM angebunden sind.</text:p>
        </text:list-item>
        <text:list-item>
          <text:p text:style-name="P2">Kostenrisiko durch parallel betriebene, sich teilweise überschneidende Lizenzprodukte.</text:p>
        </text:list-item>
        <text:list-item>
          <text:p text:style-name="P2">Skalierungsrisiko bei weiterem Wachstum der Server-, Anwendungs- und Endgeräteanzahl ohne vorherige Kapazitätsplanung.</text:p>
        </text:list-item>
      </text:list>
      <text:h text:style-name="Heading_20_2" text:outline-level="2"><text:bookmark-start text:name="bm38"/>9.3 Vorgeschlagene nächste Schritte<text:bookmark-end text:name="bm38"/></text:h>
      <text:list text:continue-numbering="true" text:style-name="WWNum2">
        <text:list-item>
          <text:p text:style-name="P2">Workshop zur Klärung der zentralen Entscheidungsfragen aus Kapitel 6.2.</text:p>
        </text:list-item>
        <text:list-item>
          <text:p text:style-name="P2">Verifizierung des in Kapitel 2 beschriebenen Ist-Zustands gemeinsam mit den jeweiligen Betriebsteams.</text:p>
        </text:list-item>
        <text:list-item>
          <text:p text:style-name="P2"><text:soft-page-break/>Priorisierung und Ressourcenplanung für Roadmap-Phase 1.</text:p>
        </text:list-item>
      </text:list>
      <text:h text:style-name="Heading_20_1" text:outline-level="1"><text:bookmark-start text:name="bm39"/>10. Anhang<text:bookmark-end text:name="bm39"/></text:h>
      <text:h text:style-name="Heading_20_2" text:outline-level="2"><text:bookmark-start text:name="bm40"/>10.1 Glossar<text:bookmark-end text:name="bm40"/></text:h>
      <text:list text:continue-numbering="true" text:style-name="WWNum2">
        <text:list-item>
          <text:p text:style-name="P2">AIOps (Artificial Intelligence for IT Operations): Einsatz von Algorithmen/Machine Learning zur Korrelation, Anomalieerkennung und Ursachenanalyse in IT-Betriebsdaten.</text:p>
        </text:list-item>
        <text:list-item>
          <text:p text:style-name="P2">APM (Application Performance Monitoring): Überwachung von Performance und Verhalten von Anwendungen.</text:p>
        </text:list-item>
        <text:list-item>
          <text:p text:style-name="P2">Cardinality: Anzahl eindeutiger Zeitreihen-Kombinationen in einem Metriksystem; hohe Kardinalität belastet Storage und Abfrageperformance.</text:p>
        </text:list-item>
        <text:list-item>
          <text:p text:style-name="P2">CERT (Computer Emergency Response Team): Spezialisiertes Team für die Erkennung, Bewertung und Behandlung sicherheitsrelevanter Vorfälle.</text:p>
        </text:list-item>
        <text:list-item>
          <text:p text:style-name="P2">CMDB (Configuration Management Database): Bestandsdatenbank für IT-Komponenten (Configuration Items) und ihre Beziehungen zueinander.</text:p>
        </text:list-item>
        <text:list-item>
          <text:p text:style-name="P2">CSDM (Common Service Data Model): Modellierungsframework von ServiceNow, das vorgibt, wie CMDB-Daten strukturiert werden, damit CIs, Anwendungen und Business Services konsistent in Beziehung stehen.</text:p>
        </text:list-item>
        <text:list-item>
          <text:p text:style-name="P2">DEX (Digital Employee Experience): Kategorie von Tools, die Gerätegesundheit und Anwendungserfahrung aus Sicht der Endanwender:innen messen.</text:p>
        </text:list-item>
        <text:list-item>
          <text:p text:style-name="P2">DPI (Deep Packet Inspection): Analyse des Inhalts von Netzwerkpaketen über reine Header-Informationen hinaus.</text:p>
        </text:list-item>
        <text:list-item>
          <text:p text:style-name="P2">ETA (Encrypted Traffic Analytics): Erkennung von Anomalien in verschlüsseltem Netzwerkverkehr anhand von Metadaten (z. B. SNI, Zertifikatsmerkmale), ohne die Verschlüsselung aufzubrechen.</text:p>
        </text:list-item>
        <text:list-item>
          <text:p text:style-name="P2">Fernmeldegeheimnis: grundrechtlich (Art. 10 GG) und einfachgesetzlich (§ 3 TTDSG) geschützte Vertraulichkeit von Kommunikationsinhalten.</text:p>
        </text:list-item>
        <text:list-item>
          <text:p text:style-name="P2">NDR (Network Detection and Response): Erkennung und Reaktion auf sicherheitsrelevante Auffälligkeiten im Netzwerkverkehr.</text:p>
        </text:list-item>
        <text:list-item>
          <text:p text:style-name="P2">Observability: Fähigkeit, den inneren Zustand eines Systems anhand von Metriken, Logs und Traces nachzuvollziehen.</text:p>
        </text:list-item>
        <text:list-item>
          <text:p text:style-name="P2">OpenTelemetry: Herstellerneutraler Standard zur Instrumentierung von Anwendungen für Traces, Metriken und Logs.</text:p>
        </text:list-item>
        <text:list-item>
          <text:p text:style-name="P2">RBAC (Role-Based Access Control): Rollenbasierte Zugriffssteuerung.</text:p>
        </text:list-item>
        <text:list-item>
          <text:p text:style-name="P2">RUM (Real User Monitoring): Messung der tatsächlichen Nutzererfahrung in Produktivsystemen.</text:p>
        </text:list-item>
        <text:list-item>
          <text:p text:style-name="P2">Service Mapping: ServiceNow-Funktion, die automatisch die technische Topologie hinter einem Business Service ermittelt und in der CMDB abbildet.</text:p>
        </text:list-item>
        <text:list-item>
          <text:p text:style-name="P2">SIEM (Security Information and Event Management): System zur Sammlung, Korrelation und Auswertung sicherheitsrelevanter Ereignisse.</text:p>
        </text:list-item>
        <text:list-item>
          <text:p text:style-name="P2">SLO/SLI (Service Level Objective/Indicator): Zielwerte und Messgrößen für Servicequalität.</text:p>
        </text:list-item>
        <text:list-item>
          <text:p text:style-name="P2"><text:soft-page-break/>Synthetic Monitoring: Aktive, simulierte Überprüfung von Diensten von außen, unabhängig von realem Nutzerverkehr.</text:p>
        </text:list-item>
        <text:list-item>
          <text:p text:style-name="P2">Tracing: Nachverfolgung einzelner Anfragen über mehrere Systeme/Services hinweg.</text:p>
        </text:list-item>
      </text:list>
      <text:h text:style-name="Heading_20_2" text:outline-level="2"><text:bookmark-start text:name="bm41"/>10.2 Referenzen und Rechtsgrundlagen<text:bookmark-end text:name="bm41"/></text:h>
      <text:list text:continue-numbering="true" text:style-name="WWNum2">
        <text:list-item>
          <text:p text:style-name="P2">§ 35 SGB I sowie §§ 67 ff. SGB X (Sozialgeheimnis und Schutz von Sozialdaten)</text:p>
        </text:list-item>
        <text:list-item>
          <text:p text:style-name="P2">Datenschutz-Grundverordnung (DSGVO), insbesondere Art. 9 (besondere Kategorien personenbezogener Daten), Art. 32 (Sicherheit der Verarbeitung) und Art. 35 (Datenschutz-Folgenabschätzung)</text:p>
        </text:list-item>
        <text:list-item>
          <text:p text:style-name="P2">§ 80 Abs. 1 Nr. 21 BPersVG (Mitbestimmung des Personalrats bei technischen Einrichtungen zur Verhaltens- oder Leistungskontrolle)</text:p>
        </text:list-item>
        <text:list-item>
          <text:p text:style-name="P2">Art. 10 GG und § 3 TTDSG (Fernmeldegeheimnis)</text:p>
        </text:list-item>
        <text:list-item>
          <text:p text:style-name="P2">BSI IT-Grundschutz-Kompendium, u. a. Bausteine zu Protokollierung sowie Detektion und Reaktion</text:p>
        </text:list-item>
        <text:list-item>
          <text:p text:style-name="P2">BSI C5-Kriterienkatalog als möglicher Bewertungsrahmen für Cloud-Dienst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3335in" fo:margin-bottom="0.1665in" style:contextual-spacing="false" fo:padding-left="0in" fo:padding-right="0in" fo:padding-top="0in" fo:padding-bottom="0.0555in" fo:border-left="none" fo:border-right="none" fo:border-top="none" fo:border-bottom="0.74pt solid #dce6ee"/>
      <style:text-properties fo:color="#2e4c6d" loext:opacity="100%" style:font-name="Calibri1" fo:font-family="Calibri" style:font-family-generic="swiss" style:font-pitch="variable" fo:font-size="16pt" fo:font-weight="bold" style:font-name-asian="Calibri2" style:font-family-asian="Calibri" style:font-family-generic-asian="system" style:font-pitch-asian="variable" style:font-size-asian="16pt" style:font-weight-asian="bold" style:font-name-complex="Calibri2" style:font-family-complex="Calibri"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222in" fo:margin-bottom="0.111in" style:contextual-spacing="false"/>
      <style:text-properties fo:color="#2e4c6d" loext:opacity="100%" style:font-name="Calibri1" fo:font-family="Calibri" style:font-family-generic="swiss"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1665in" fo:margin-bottom="0.0835in" style:contextual-spacing="false"/>
      <style:text-properties fo:color="#5b6470" loext:opacity="100%" style:font-name="Calibri1" fo:font-family="Calibri" style:font-family-generic="swiss" style:font-pitch="variable" fo:font-size="11pt" fo:font-weight="bold" style:font-name-asian="Calibri2" style:font-family-asian="Calibri" style:font-family-generic-asian="system" style:font-pitch-asian="variable" style:font-size-asian="11pt" style:font-weight-asian="bold" style:font-name-complex="Calibri2" style:font-family-complex="Calibri" style:font-family-generic-complex="system" style:font-pitch-complex="variable" style:font-size-complex="11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fo:color="#2e4c6d" loext:opacity="100%" fo:font-size="10.5pt" fo:font-weight="bold" style:font-size-asian="10.5pt" style:font-weight-asian="bold" style:font-size-complex="10.5pt" style:font-weight-complex="bold"/>
    </style:style>
    <style:style style:name="ListLabel_20_13" style:display-name="ListLabel 13" style:family="text">
      <style:text-properties fo:color="#000000" loext:opacity="100%" fo:font-size="10pt" fo:font-weight="normal" style:font-size-asian="10pt" style:font-weight-asian="normal" style:font-size-complex="10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66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665in" fo:margin-left="0.666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T1" style:family="text">
      <style:text-properties fo:color="#5b6470" loext:opacity="100%" fo:font-size="8pt" style:font-size-asian="8pt" style:font-size-complex="8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nitoring-Architektur – Konzeptpapier (Entwurf)</text:span></text:p>
      </style:header>
      <style:footer>
        <text:p text:style-name="MP2"><text:span text:style-name="MT1">Seite </text:span><text:page-number text:select-page="current">22</text:page-number><text:span text:style-name="MT1"><text:s/>von </text:span><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nitoring-Architektur – Konzeptpapier</dc:title>
    <meta:initial-creator>Claude</meta:initial-creator>
    <dc:creator>Un-named</dc:creator>
    <meta:editing-cycles>1</meta:editing-cycles>
    <meta:creation-date>2026-06-21T20:45:58.153000000</meta:creation-date>
    <dc:date>2026-06-21T20:45:58.153000000</dc:date>
    <meta:document-statistic meta:table-count="10" meta:image-count="1" meta:object-count="0" meta:page-count="22" meta:paragraph-count="588" meta:word-count="5258" meta:character-count="44712" meta:non-whitespace-character-count="40133"/>
    <meta:generator>LibreOffice/24.2.7.2$Linux_X86_64 LibreOffice_project/420$Build-2</meta:generator>
  </office:meta>
</office:document-meta>
</file>